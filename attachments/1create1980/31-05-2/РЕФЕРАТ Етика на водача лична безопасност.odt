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Нормален" style:master-page-name="MP0" style:family="paragraph">
      <style:paragraph-properties fo:break-before="page" fo:text-align="center"/>
    </style:style>
    <style:style style:name="T2" style:parent-style-name="Шрифтнаабзацапоподразбиране" style:family="text">
      <style:text-properties fo:font-weight="bold" style:font-weight-asian="bold" style:font-weight-complex="bold"/>
    </style:style>
    <style:style style:name="T3" style:parent-style-name="Шрифтнаабзацапоподразбиране" style:family="text">
      <style:text-properties fo:font-weight="bold" style:font-weight-asian="bold" style:font-weight-complex="bold"/>
    </style:style>
    <style:style style:name="T4" style:parent-style-name="Шрифтнаабзацапоподразбиране" style:family="text">
      <style:text-properties fo:font-weight="bold" style:font-weight-asian="bold" style:font-weight-complex="bold" fo:language="bg" fo:country="BG"/>
    </style:style>
    <style:style style:name="P5" style:parent-style-name="Нормален" style:family="paragraph">
      <style:paragraph-properties fo:text-align="center"/>
      <style:text-properties fo:font-weight="bold" style:font-weight-asian="bold" style:font-weight-complex="bold" fo:language="bg" fo:country="BG"/>
    </style:style>
    <style:style style:name="P6" style:parent-style-name="Нормален" style:family="paragraph">
      <style:paragraph-properties fo:text-align="center"/>
      <style:text-properties fo:font-weight="bold" style:font-weight-asian="bold" style:font-weight-complex="bold" fo:language="bg" fo:country="BG"/>
    </style:style>
    <style:style style:name="P7" style:parent-style-name="Нормален" style:family="paragraph">
      <style:paragraph-properties fo:text-align="center"/>
      <style:text-properties fo:language="bg" fo:country="BG"/>
    </style:style>
    <style:style style:name="P8" style:parent-style-name="Нормален" style:family="paragraph">
      <style:text-properties fo:font-weight="bold" style:font-weight-asian="bold" style:font-weight-complex="bold"/>
    </style:style>
    <style:style style:name="T9" style:parent-style-name="Шрифтнаабзацапоподразбиране" style:family="text">
      <style:text-properties fo:font-weight="bold" style:font-weight-asian="bold" style:font-weight-complex="bold" fo:language="bg" fo:country="BG"/>
    </style:style>
    <style:style style:name="T10" style:parent-style-name="Шрифтнаабзацапоподразбиране" style:family="text">
      <style:text-properties fo:font-weight="bold" style:font-weight-asian="bold" style:font-weight-complex="bold"/>
    </style:style>
    <style:style style:name="T11" style:parent-style-name="Шрифтнаабзацапоподразбиране" style:family="text">
      <style:text-properties fo:font-weight="bold" style:font-weight-asian="bold" style:font-weight-complex="bold"/>
    </style:style>
    <style:style style:name="P12" style:parent-style-name="Нормален" style:family="paragraph">
      <style:text-properties fo:font-weight="bold" style:font-weight-asian="bold" style:font-weight-complex="bold"/>
    </style:style>
    <style:style style:name="T13" style:parent-style-name="Шрифтнаабзацапоподразбиране" style:family="text">
      <style:text-properties fo:language="bg" fo:country="BG"/>
    </style:style>
    <style:style style:name="T14" style:parent-style-name="Шрифтнаабзацапоподразбиране" style:family="text">
      <style:text-properties fo:language="bg" fo:country="BG"/>
    </style:style>
    <style:style style:name="P15" style:parent-style-name="Нормален" style:family="paragraph">
      <style:text-properties fo:language="bg" fo:country="BG"/>
    </style:style>
    <style:style style:name="P16" style:parent-style-name="Нормален" style:family="paragraph">
      <style:text-properties fo:language="bg" fo:country="BG"/>
    </style:style>
    <style:style style:name="P17" style:parent-style-name="Нормален" style:family="paragraph">
      <style:text-properties fo:language="bg" fo:country="BG"/>
    </style:style>
    <style:style style:name="P18" style:parent-style-name="Нормален" style:family="paragraph">
      <style:text-properties fo:language="bg" fo:country="BG"/>
    </style:style>
    <style:style style:name="P19" style:parent-style-name="Нормален" style:family="paragraph">
      <style:text-properties fo:language="bg" fo:country="BG"/>
    </style:style>
    <style:style style:name="P20" style:parent-style-name="Нормален" style:family="paragraph">
      <style:text-properties fo:font-weight="bold" style:font-weight-asian="bold" style:font-weight-complex="bold"/>
    </style:style>
    <style:style style:name="T21" style:parent-style-name="Шрифтнаабзацапоподразбиране" style:family="text">
      <style:text-properties fo:language="bg" fo:country="BG"/>
    </style:style>
    <style:style style:name="P22" style:parent-style-name="Нормален" style:family="paragraph">
      <style:text-properties fo:font-weight="bold" style:font-weight-asian="bold" style:font-weight-complex="bold"/>
    </style:style>
    <style:style style:name="P23" style:parent-style-name="Нормален" style:family="paragraph">
      <style:text-properties fo:font-weight="bold" style:font-weight-asian="bold" style:font-weight-complex="bold"/>
    </style:style>
    <style:style style:name="P24" style:parent-style-name="Нормален" style:family="paragraph">
      <style:text-properties fo:language="bg" fo:country="BG"/>
    </style:style>
    <style:style style:name="P25" style:parent-style-name="Нормален" style:family="paragraph">
      <style:text-properties fo:language="bg" fo:country="BG"/>
    </style:style>
    <style:style style:name="P26" style:parent-style-name="Нормален" style:family="paragraph">
      <style:text-properties fo:language="bg" fo:country="BG"/>
    </style:style>
    <style:style style:name="P27" style:parent-style-name="Нормален" style:family="paragraph">
      <style:text-properties fo:font-weight="bold" style:font-weight-asian="bold" style:font-weight-complex="bold"/>
    </style:style>
    <style:style style:name="T28" style:parent-style-name="Шрифтнаабзацапоподразбиране" style:family="text">
      <style:text-properties fo:language="bg" fo:country="BG"/>
    </style:style>
    <style:style style:name="P29" style:parent-style-name="Нормален" style:family="paragraph">
      <style:text-properties fo:language="bg" fo:country="BG"/>
    </style:style>
    <style:style style:name="T30" style:parent-style-name="Шрифтнаабзацапоподразбиране" style:family="text">
      <style:text-properties fo:language="bg" fo:country="BG"/>
    </style:style>
    <style:style style:name="T31" style:parent-style-name="Шрифтнаабзацапоподразбиране" style:family="text">
      <style:text-properties fo:language="bg" fo:country="BG"/>
    </style:style>
    <style:style style:name="P32" style:parent-style-name="Нормален" style:family="paragraph">
      <style:text-properties fo:font-weight="bold" style:font-weight-asian="bold" style:font-weight-complex="bold"/>
    </style:style>
    <style:style style:name="P33" style:parent-style-name="Нормален" style:family="paragraph">
      <style:text-properties fo:font-weight="bold" style:font-weight-asian="bold" style:font-weight-complex="bold"/>
    </style:style>
    <style:style style:name="T34" style:parent-style-name="Шрифтнаабзацапоподразбиране" style:family="text">
      <style:text-properties fo:language="bg" fo:country="BG"/>
    </style:style>
    <style:style style:name="P35" style:parent-style-name="Нормален" style:family="paragraph">
      <style:text-properties fo:font-weight="bold" style:font-weight-asian="bold" style:font-weight-complex="bold"/>
    </style:style>
    <style:style style:name="T36" style:parent-style-name="Шрифтнаабзацапоподразбиране" style:family="text">
      <style:text-properties fo:language="bg" fo:country="BG"/>
    </style:style>
    <style:style style:name="T37" style:parent-style-name="Шрифтнаабзацапоподразбиране" style:family="text">
      <style:text-properties fo:language="bg" fo:country="BG"/>
    </style:style>
    <style:style style:name="P38" style:parent-style-name="Нормален" style:family="paragraph">
      <style:text-properties fo:font-weight="bold" style:font-weight-asian="bold" style:font-weight-complex="bold"/>
    </style:style>
    <style:style style:name="T39" style:parent-style-name="Шрифтнаабзацапоподразбиране" style:family="text">
      <style:text-properties fo:language="bg" fo:country="BG"/>
    </style:style>
    <style:style style:name="T40" style:parent-style-name="Шрифтнаабзацапоподразбиране" style:family="text">
      <style:text-properties fo:language="bg" fo:country="BG"/>
    </style:style>
    <style:style style:name="T41" style:parent-style-name="Шрифтнаабзацапоподразбиране" style:family="text">
      <style:text-properties fo:language="bg" fo:country="BG"/>
    </style:style>
    <style:style style:name="P42" style:parent-style-name="Нормален" style:family="paragraph">
      <style:text-properties fo:language="bg" fo:country="BG"/>
    </style:style>
    <style:style style:name="P43" style:parent-style-name="Нормален" style:family="paragraph">
      <style:text-properties fo:language="bg" fo:country="BG"/>
    </style:style>
    <style:style style:name="P44" style:parent-style-name="Нормален" style:family="paragraph">
      <style:text-properties fo:language="bg" fo:country="BG"/>
    </style:style>
    <style:style style:name="P45" style:parent-style-name="Нормален" style:family="paragraph">
      <style:text-properties fo:font-size="14pt" style:font-size-asian="14pt" style:font-size-complex="14pt"/>
    </style:style>
  </office:automatic-styles>
  <office:body>
    <office:text text:use-soft-page-breaks="true">
      <text:p text:style-name="P1"><text:span text:style-name="T2">РЕФЕРАТ</text:span><text:span text:style-name="T3"><text:s/></text:span><text:span text:style-name="T4"><text:s/>‘‘ЕТИКА НА ВОДАЧА‘‘</text:span></text:p>
      <text:p text:style-name="P5">‘‘Лична безопастност и сигурност за останалите участници в движението по начин на мислене‘‘</text:p>
      <text:p text:style-name="P6">Изготвил: Алекс Първанов, курс 753 фак№:25002083</text:p>
      <text:p text:style-name="P7"/>
      <text:p text:style-name="P8">Увод</text:p>
      <text:p text:style-name="Нормален"/>
      <text:p text:style-name="Нормален"><text:span text:style-name="T9"><text:s text:c="2"/></text:span><text:span text:style-name="T10">Етиката на водача<text:s/></text:span>е изключително важна част от културата на движение по пътищата. Тя не се изразява само в спазването на правилата за движение, а и в начина, по който водачът мисли, взема решения и се отнася към останалите участници в движението. Всеки водач носи отговорност не само за собствената си безопасност, но и за безопасността на пешеходците, пътниците, велосипедистите, мотористите и другите шофьори.</text:p>
      <text:p text:style-name="Нормален"/>
      <text:p text:style-name="Нормален"><text:span text:style-name="T11">Личната безопасност и сигурността на останалите участници в движението<text:s/></text:span>започват още от мисленето на водача. Ако човек зад волана подхожда спокойно, отговорно и разумно, вероятността да предизвика опасна ситуация е много по-малка. Обратно, ако водачът е агресивен, разсеян, нетърпелив или самоуверен, рискът от пътнотранспортно произшествие значително се увеличава.</text:p>
      <text:p text:style-name="Нормален"/>
      <text:p text:style-name="P12">Същност на етиката на водача</text:p>
      <text:p text:style-name="Нормален"/>
      <text:p text:style-name="Нормален"><text:span text:style-name="T13"><text:s text:c="2"/></text:span>Етиката на водача представлява съвкупност от морални правила, отговорно поведение и уважение към всички участници в движението. Тя включва не само законовите изисквания, но и човешкото отношение към другите. Един добър водач не мисли само как да стигне по-бързо до крайната си цел, а как да го направи безопасно, спокойно и без да застрашава никого.</text:p>
      <text:p text:style-name="Нормален"/>
      <text:p text:style-name="Нормален"><text:span text:style-name="T14"><text:s text:c="3"/></text:span>Етичното поведение на пътя включва търпение, толерантност, внимание, самоконтрол и предвиждане на възможни опасности. Водачът трябва да разбира, че движението по пътищата е обща среда, в която всеки има права, но и задължения. Егоистичното поведение зад волана може да има тежки последствия.</text:p>
      <text:p text:style-name="P15"/>
      <text:p text:style-name="P16"/>
      <text:p text:style-name="P17"/>
      <text:p text:style-name="P18"/>
      <text:p text:style-name="P19"/>
      <text:soft-page-break/>
      <text:p text:style-name="P20">Лична безопасност на водача</text:p>
      <text:p text:style-name="Нормален"/>
      <text:p text:style-name="Нормален"><text:span text:style-name="T21"><text:s/></text:span>Личната безопасност на водача започва с правилната психическа настройка. Преди да седне зад волана, човек трябва да бъде спокоен, концентриран и физически годен да управлява автомобил. Умората, стресът, алкохолът, наркотичните вещества, силните емоции и разсейването могат сериозно да нарушат способността за безопасно шофиране.</text:p>
      <text:p text:style-name="Нормален"/>
      <text:p text:style-name="Нормален">Отговорният водач трябва да проверява техническото състояние на автомобила, да използва предпазен колан, да спазва ограниченията на скоростта и да избира скорост, съобразена с пътните условия. Личната безопасност не означава само да се пазиш от грешките на другите, а и да не допускаш собствени грешки чрез невнимание или прибързаност.</text:p>
      <text:p text:style-name="Нормален"/>
      <text:p text:style-name="Нормален">Много важна част от личната безопасност е самоконтролът. Водачът не бива да се поддава на провокации, агресия или състезателно поведение на пътя. Дори когато друг участник в движението направи грешка, правилната реакция е спокойствие и предпазливост, а не отмъщение или рисково поведение.</text:p>
      <text:p text:style-name="P22"/>
      <text:p text:style-name="P23">Сигурност за останалите участници в движението</text:p>
      <text:p text:style-name="Нормален"/>
      <text:p text:style-name="Нормален">Всеки водач има морално задължение да пази останалите участници в движението. Това важи особено за по-уязвимите групи като пешеходци, деца, възрастни хора, велосипедисти и мотористи. Те често са по-слабо защитени и при инцидент последствията за тях могат да бъдат много тежки.</text:p>
      <text:p text:style-name="Нормален"/>
      <text:p text:style-name="Нормален">Сигурността на останалите зависи от начина, по който водачът наблюдава пътната обстановка и предвижда възможни рискове. Например при приближаване към пешеходна пътека водачът трябва да намали скоростта и да бъде готов да спре. В жилищни зони, около училища, спирки и кръстовища е необходимо повишено внимание.</text:p>
      <text:p text:style-name="Нормален"/>
      <text:p text:style-name="Нормален">Етичният водач не използва автомобила като средство за налагане на предимство или демонстрация на сила. Той уважава правото на другите да се движат безопасно. Това означава да не засича, да не притиска другите автомобили, да не използва клаксона агресивно, да не кара прекалено близо до предното превозно средство и да не създава излишно напрежение.</text:p>
      <text:p text:style-name="P24"/>
      <text:p text:style-name="P25"/>
      <text:p text:style-name="P26"/>
      <text:soft-page-break/>
      <text:p text:style-name="P27">Начин на мислене на отговорния водач</text:p>
      <text:p text:style-name="Нормален"/>
      <text:p text:style-name="Нормален"><text:span text:style-name="T28"><text:s text:c="2"/></text:span>Начинът на мислене е основата на безопасното шофиране. Отговорният водач мисли предварително, предвижда възможни ситуации и не разчита само на реакция в последния момент. Той разбира, че на пътя винаги може да възникне неочаквана опасност.</text:p>
      <text:p text:style-name="P29"><text:s text:c="2"/></text:p>
      <text:p text:style-name="Нормален"><text:span text:style-name="T30"><text:s text:c="3"/></text:span>Правилният начин на мислене включва осъзнаване на риска. Това означава водачът да не надценява уменията си и да не подценява пътната обстановка. Дори опитният шофьор може да допусне грешка, ако стане прекалено самоуверен. Истински добрият водач не е този, който кара най-бързо, а този, който умее да стигне безопасно.</text:p>
      <text:p text:style-name="Нормален"/>
      <text:p text:style-name="Нормален"><text:span text:style-name="T31"><text:s text:c="3"/></text:span>Отговорното мислене включва и уважение към закона. Правилата за движение не са създадени, за да ограничават водачите без причина, а за да защитят живота и здравето на хората. Когато един водач спазва правилата, той показва уважение към обществото и към човешкия живот.</text:p>
      <text:p text:style-name="Нормален"/>
      <text:p text:style-name="P32">Агресията на пътя като липса на етика</text:p>
      <text:p text:style-name="Нормален"/>
      <text:p text:style-name="Нормален">Агресивното поведение на пътя е един от най-сериозните проблеми в съвременното движение. То може да се проявява чрез висока скорост, рискови изпреварвания, неспазване на дистанция, засичане, обиди, натискане с автомобила и грубо отношение към другите.</text:p>
      <text:p text:style-name="Нормален"/>
      <text:p text:style-name="Нормален">Такова поведение показва липса на самоконтрол и ниска култура на движение. Агресията зад волана често води до опасни ситуации, защото водачът започва да действа емоционално, а не разумно. Етичният водач трябва да може да овладява емоциите си и да поставя безопасността над егото си.</text:p>
      <text:p text:style-name="Нормален"/>
      <text:p text:style-name="Нормален">Важно е да се разбере, че пътят не е място за доказване. Един момент на нервност или прибързано решение може да доведе до тежки последствия за много хора. Затова спокойствието и търпението са едни от най-важните качества на добрия водач.</text:p>
      <text:p text:style-name="Нормален"/>
      <text:p text:style-name="P33">Ролята на вниманието и концентрацията</text:p>
      <text:p text:style-name="Нормален"/>
      <text:p text:style-name="Нормален"><text:span text:style-name="T34"><text:s text:c="2"/></text:span>Вниманието е основен фактор за безопасното управление на моторно превозно средство. Разсейването по време на шофиране може да бъде също толкова опасно, колкото и високата скорост. Използването на телефон, писането на съобщения, силната<text:s/><text:soft-page-break/>музика или разговори, които отклоняват вниманието, могат да доведат до загуба на контрол върху ситуацията.</text:p>
      <text:p text:style-name="Нормален"/>
      <text:p text:style-name="Нормален">Етичният водач разбира, че когато управлява автомобил, основната му задача е да наблюдава пътя и да реагира правилно. Той не поставя личния си комфорт или бързина над безопасността. Концентрацията показва уважение към живота — както собствения, така и този на другите.</text:p>
      <text:p text:style-name="Нормален"/>
      <text:p text:style-name="P35">Толерантност и уважение в движението</text:p>
      <text:p text:style-name="Нормален"/>
      <text:p text:style-name="Нормален"><text:span text:style-name="T36"><text:s text:c="3"/></text:span>Толерантността е важна част от етиката на водача. На пътя има хора с различен опит, възраст и способности. Някои водачи са начинаещи, други са по-възрастни, трети може да не познават добре района. Вместо да се реагира с агресия, по-правилно е да се прояви разбиране.</text:p>
      <text:p text:style-name="Нормален"/>
      <text:p text:style-name="Нормален"><text:span text:style-name="T37"><text:s text:c="3"/></text:span>Уважението към останалите участници в движението се изразява чрез даване на предимство, спазване на дистанция, търпение при маневриране и избягване на рискови действия. Малките жестове на пътя често предотвратяват големи проблеми. Когато водачите проявяват култура и уважение, движението става по-безопасно и по-спокойно за всички.</text:p>
      <text:p text:style-name="Нормален"/>
      <text:p text:style-name="P38">Заключение</text:p>
      <text:p text:style-name="Нормален"/>
      <text:p text:style-name="Нормален"><text:span text:style-name="T39"><text:s text:c="3"/></text:span>Етиката на водача е неразделна част от безопасността на движението. Тя започва от начина на мислене и се проявява във всяко действие зад волана. Личната безопасност и сигурността на останалите участници в движението зависят от отговорността, вниманието, самоконтрола и уважението на всеки водач.</text:p>
      <text:p text:style-name="Нормален"/>
      <text:p text:style-name="Нормален"><text:span text:style-name="T40"><text:s text:c="3"/></text:span>Добър водач не е само този, който познава правилата, а този, който ги прилага с разбиране и отговорност. Шофирането не трябва да бъде проява на его, агресия или бързане, а разумна дейност, при която най-важни са животът и здравето на хората.</text:p>
      <text:p text:style-name="Нормален"/>
      <text:p text:style-name="Нормален"><text:span text:style-name="T41"><text:s text:c="2"/></text:span>Затова етичният начин на мислене е основата на безопасното движение. Когато водачът мисли не само за себе си, но и за останалите, той допринася за по-сигурна, спокойна и човешка пътна среда.</text:p>
      <text:p text:style-name="P42"/>
      <text:p text:style-name="P43"/>
      <text:p text:style-name="P44"/>
      <text:soft-page-break/>
      <text:p text:style-name="Нормален">Използвана литература</text:p>
      <text:p text:style-name="Нормален">Закон за движението по пътищата.</text:p>
      <text:p text:style-name="Нормален">Правилник за прилагане на Закона за движението по пътищата.</text:p>
      <text:p text:style-name="Нормален">Учебни материали по безопасност на движението.</text:p>
      <text:p text:style-name="Нормален">Материали, свързани с етика и култура на поведение на водача.<text:line-break/></text:p>
      <text:p text:style-name="P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Заглавие1" style:display-name="Заглавие 1" style:family="paragraph" style:parent-style-name="Нормален" style:next-style-name="Нормален"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Заглавие2" style:display-name="Заглавие 2" style:family="paragraph" style:parent-style-name="Нормален" style:next-style-name="Нормален"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Заглавие3" style:display-name="Заглавие 3" style:family="paragraph" style:parent-style-name="Нормален" style:next-style-name="Нормален"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Заглавие4" style:display-name="Заглавие 4" style:family="paragraph" style:parent-style-name="Нормален" style:next-style-name="Нормален"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Заглавие5" style:display-name="Заглавие 5" style:family="paragraph" style:parent-style-name="Нормален" style:next-style-name="Нормален" style:default-outline-level="5">
      <style:paragraph-properties fo:keep-with-next="always" fo:keep-together="always" fo:margin-top="0.0555in" fo:margin-bottom="0.0277in"/>
      <style:text-properties style:font-name-asian="Times New Roman" fo:color="#0F4761" fo:hyphenate="false"/>
    </style:style>
    <style:style style:name="Заглавие6" style:display-name="Заглавие 6" style:family="paragraph" style:parent-style-name="Нормален" style:next-style-name="Нормален"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Заглавие7" style:display-name="Заглавие 7" style:family="paragraph" style:parent-style-name="Нормален" style:next-style-name="Нормален" style:default-outline-level="7">
      <style:paragraph-properties fo:keep-with-next="always" fo:keep-together="always" fo:margin-top="0.0277in" fo:margin-bottom="0in"/>
      <style:text-properties style:font-name-asian="Times New Roman" fo:color="#595959" fo:hyphenate="false"/>
    </style:style>
    <style:style style:name="Заглавие8" style:display-name="Заглавие 8" style:family="paragraph" style:parent-style-name="Нормален" style:next-style-name="Нормален"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Заглавие9" style:display-name="Заглавие 9" style:family="paragraph" style:parent-style-name="Нормален" style:next-style-name="Нормален" style:default-outline-level="9">
      <style:paragraph-properties fo:keep-with-next="always" fo:keep-together="always" fo:margin-bottom="0in"/>
      <style:text-properties style:font-name-asian="Times New Roman" fo:color="#272727" fo:hyphenate="false"/>
    </style:style>
    <style:style style:name="Нормален" style:display-name="Нормален" style:family="paragraph">
      <style:text-properties fo:hyphenate="false"/>
    </style:style>
    <style:style style:name="Шрифтнаабзацапоподразбиране" style:display-name="Шрифт на абзаца по подразбиране" style:family="text"/>
    <style:style style:name="Заглавие1Знак" style:display-name="Заглавие 1 Знак" style:family="text" style:parent-style-name="Шрифтнаабзацапоподразбиране">
      <style:text-properties style:font-name="Aptos Display" style:font-name-asian="Times New Roman" style:font-name-complex="Times New Roman" fo:color="#0F4761" fo:font-size="20pt" style:font-size-asian="20pt" style:font-size-complex="20pt"/>
    </style:style>
    <style:style style:name="Заглавие2Знак" style:display-name="Заглавие 2 Знак" style:family="text" style:parent-style-name="Шрифтнаабзацапоподразбиране">
      <style:text-properties style:font-name="Aptos Display" style:font-name-asian="Times New Roman" style:font-name-complex="Times New Roman" fo:color="#0F4761" fo:font-size="16pt" style:font-size-asian="16pt" style:font-size-complex="16pt"/>
    </style:style>
    <style:style style:name="Заглавие3Знак" style:display-name="Заглавие 3 Знак" style:family="text" style:parent-style-name="Шрифтнаабзацапоподразбиране">
      <style:text-properties style:font-name-asian="Times New Roman" style:font-name-complex="Times New Roman" fo:color="#0F4761" fo:font-size="14pt" style:font-size-asian="14pt" style:font-size-complex="14pt"/>
    </style:style>
    <style:style style:name="Заглавие4Знак" style:display-name="Заглавие 4 Знак" style:family="text" style:parent-style-name="Шрифтнаабзацапоподразбиране">
      <style:text-properties style:font-name-asian="Times New Roman" style:font-name-complex="Times New Roman" fo:font-style="italic" style:font-style-asian="italic" style:font-style-complex="italic" fo:color="#0F4761"/>
    </style:style>
    <style:style style:name="Заглавие5Знак" style:display-name="Заглавие 5 Знак" style:family="text" style:parent-style-name="Шрифтнаабзацапоподразбиране">
      <style:text-properties style:font-name-asian="Times New Roman" style:font-name-complex="Times New Roman" fo:color="#0F4761"/>
    </style:style>
    <style:style style:name="Заглавие6Знак" style:display-name="Заглавие 6 Знак" style:family="text" style:parent-style-name="Шрифтнаабзацапоподразбиране">
      <style:text-properties style:font-name-asian="Times New Roman" style:font-name-complex="Times New Roman" fo:font-style="italic" style:font-style-asian="italic" style:font-style-complex="italic" fo:color="#595959"/>
    </style:style>
    <style:style style:name="Заглавие7Знак" style:display-name="Заглавие 7 Знак" style:family="text" style:parent-style-name="Шрифтнаабзацапоподразбиране">
      <style:text-properties style:font-name-asian="Times New Roman" style:font-name-complex="Times New Roman" fo:color="#595959"/>
    </style:style>
    <style:style style:name="Заглавие8Знак" style:display-name="Заглавие 8 Знак" style:family="text" style:parent-style-name="Шрифтнаабзацапоподразбиране">
      <style:text-properties style:font-name-asian="Times New Roman" style:font-name-complex="Times New Roman" fo:font-style="italic" style:font-style-asian="italic" style:font-style-complex="italic" fo:color="#272727"/>
    </style:style>
    <style:style style:name="Заглавие9Знак" style:display-name="Заглавие 9 Знак" style:family="text" style:parent-style-name="Шрифтнаабзацапоподразбиране">
      <style:text-properties style:font-name-asian="Times New Roman" style:font-name-complex="Times New Roman" fo:color="#272727"/>
    </style:style>
    <style:style style:name="Заглавие" style:display-name="Заглавие" style:family="paragraph" style:parent-style-name="Нормален" style:next-style-name="Нормален">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ЗаглавиеЗнак" style:display-name="Заглавие Знак" style:family="text" style:parent-style-name="Шрифтнаабзацапоподразбиране">
      <style:text-properties style:font-name="Aptos Display" style:font-name-asian="Times New Roman" style:font-name-complex="Times New Roman" fo:letter-spacing="-0.0069in" style:letter-kerning="true" fo:font-size="28pt" style:font-size-asian="28pt" style:font-size-complex="28pt"/>
    </style:style>
    <style:style style:name="Подзаглавие" style:display-name="Подзаглавие" style:family="paragraph" style:parent-style-name="Нормален" style:next-style-name="Нормален">
      <style:text-properties style:font-name-asian="Times New Roman" fo:color="#595959" fo:letter-spacing="0.0104in" fo:font-size="14pt" style:font-size-asian="14pt" style:font-size-complex="14pt" fo:hyphenate="false"/>
    </style:style>
    <style:style style:name="ПодзаглавиеЗнак" style:display-name="Подзаглавие Знак" style:family="text" style:parent-style-name="Шрифтнаабзацапоподразбиране">
      <style:text-properties style:font-name-asian="Times New Roman" style:font-name-complex="Times New Roman" fo:color="#595959" fo:letter-spacing="0.0104in" fo:font-size="14pt" style:font-size-asian="14pt" style:font-size-complex="14pt"/>
    </style:style>
    <style:style style:name="Цитат" style:display-name="Цитат" style:family="paragraph" style:parent-style-name="Нормален" style:next-style-name="Нормален">
      <style:paragraph-properties fo:text-align="center" fo:margin-top="0.1111in"/>
      <style:text-properties fo:font-style="italic" style:font-style-asian="italic" style:font-style-complex="italic" fo:color="#404040" fo:hyphenate="false"/>
    </style:style>
    <style:style style:name="ЦитатЗнак" style:display-name="Цитат Знак" style:family="text" style:parent-style-name="Шрифтнаабзацапоподразбиране">
      <style:text-properties fo:font-style="italic" style:font-style-asian="italic" style:font-style-complex="italic" fo:color="#404040"/>
    </style:style>
    <style:style style:name="Списъкнаабзаци" style:display-name="Списък на абзаци" style:family="paragraph" style:parent-style-name="Нормален">
      <style:paragraph-properties style:contextual-spacing="true" fo:margin-left="0.5in">
        <style:tab-stops/>
      </style:paragraph-properties>
      <style:text-properties fo:hyphenate="false"/>
    </style:style>
    <style:style style:name="Интензивноакцентиран" style:display-name="Интензивно акцентиран" style:family="text" style:parent-style-name="Шрифтнаабзацапоподразбиране">
      <style:text-properties fo:font-style="italic" style:font-style-asian="italic" style:font-style-complex="italic" fo:color="#0F4761"/>
    </style:style>
    <style:style style:name="Интензивноцитиране" style:display-name="Интензивно цитиране" style:family="paragraph" style:parent-style-name="Нормален" style:next-style-name="Нормален">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ИнтензивноцитиранеЗнак" style:display-name="Интензивно цитиране Знак" style:family="text" style:parent-style-name="Шрифтнаабзацапоподразбиране">
      <style:text-properties fo:font-style="italic" style:font-style-asian="italic" style:font-style-complex="italic" fo:color="#0F4761"/>
    </style:style>
    <style:style style:name="Интензивнапрепратка" style:display-name="Интензивна препратка" style:family="text" style:parent-style-name="Шрифтнаабзацапоподразбиране">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Алекс Първанов</meta:initial-creator>
    <dc:creator>Алекс Първанов</dc:creator>
    <meta:creation-date>2026-05-27T20:19:00Z</meta:creation-date>
    <dc:date>2026-05-27T20:19:00Z</dc:date>
    <meta:template xlink:href="Normal" xlink:type="simple"/>
    <meta:editing-cycles>2</meta:editing-cycles>
    <meta:editing-duration>PT660S</meta:editing-duration>
    <meta:document-statistic meta:page-count="5" meta:paragraph-count="15" meta:word-count="1132" meta:character-count="7576" meta:row-count="53" meta:non-whitespace-character-count="6459"/>
  </office:meta>
</office:document-meta>
</file>