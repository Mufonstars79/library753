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eg" manifest:media-type="image/jpe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9">
      <style:drawing-page-properties draw:fill="bitmap" draw:fill-image-name="a1338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9">
      <style:drawing-page-properties draw:fill="bitmap" draw:fill-image-name="a888" style:repeat="stretch" draw:opacity="45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Tahoma" style:font-family-complex="Tahoma" style:font-family-generic-asian="swiss" style:font-family-generic-complex="swiss" style:font-pitch-asian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Tahoma" style:font-family-complex="Tahoma" style:font-family-generic-asian="swiss" style:font-family-generic-complex="swiss" style:font-pitch-asian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8">
      <style:drawing-page-properties draw:fill="bitmap" draw:fill-image-name="a1867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Tahoma" style:font-family-complex="Tahoma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84">
      <style:graphic-properties draw:fill="none" draw:stroke="solid" svg:stroke-width="0.01389in" svg:stroke-color="#000000" svg:stroke-opacity="100%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0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4">
      <style:drawing-page-properties draw:fill="bitmap" draw:fill-image-name="a1203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1">
      <style:drawing-page-properties draw:fill="bitmap" draw:fill-image-name="a1390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4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8">
      <style:drawing-page-properties draw:fill="bitmap" draw:fill-image-name="a1737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01">
      <style:text-properties fo:language="en" fo:country="GB"/>
    </style:style>
    <style:style style:family="text" style:name="a1602">
      <style:text-properties fo:language="en" fo:country="GB"/>
    </style:style>
    <style:style style:family="text" style:name="a1603">
      <style:text-properties fo:language="en" fo:country="GB"/>
    </style:style>
    <style:style style:family="text" style:name="a1604">
      <style:text-properties fo:language="en" fo:country="GB"/>
    </style:style>
    <style:style style:family="text" style:name="a1605">
      <style:text-properties fo:language="en" fo:country="GB"/>
    </style:style>
    <style:style style:family="text" style:name="a1606">
      <style:text-properties fo:language="en" fo:country="GB"/>
    </style:style>
    <style:style style:family="text" style:name="a1607">
      <style:text-properties fo:language="en" fo:country="GB"/>
    </style:style>
    <style:style style:family="text" style:name="a1608">
      <style:text-properties fo:language="en" fo:country="G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2">
      <style:drawing-page-properties draw:fill="bitmap" draw:fill-image-name="a1621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3">
      <style:drawing-page-properties draw:fill="bitmap" draw:fill-image-name="a1142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6">
      <style:drawing-page-properties draw:fill="bitmap" draw:fill-image-name="a1505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507">
      <style:table-properties style:writing-mode="lr-tb"/>
    </style:style>
    <style:style style:family="table-column" style:name="a1508">
      <style:table-column-properties style:column-width="3.32102in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509">
      <style:table-column-properties style:column-width="1.75398in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6">
      <style:drawing-page-properties draw:fill="bitmap" draw:fill-image-name="a1005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510">
      <style:table-column-properties style:column-width="5.85in"/>
    </style:style>
    <style:style style:family="table-row" style:name="a1511">
      <style:table-row-properties style:row-height="0.40556in"/>
    </style:style>
    <style:style style:family="text" style:name="a1512">
      <style:text-properties fo:font-size="0.33333in" style:font-size-asian="0.33333in" style:font-size-complex="0.33333in" fo:language="en" fo:country="GB" fo:font-weight="bold" style:font-weight-asian="bold" style:font-weight-complex="bold"/>
    </style:style>
    <style:style style:family="text" style:name="a1513">
      <style:text-properties fo:font-size="0.33333in" style:font-size-asian="0.33333in" style:font-size-complex="0.33333in" fo:language="en" fo:country="GB" fo:font-weight="bold" style:font-weight-asian="bold" style:font-weight-complex="bold"/>
    </style:style>
    <style:style style:family="paragraph" style:name="a1514">
      <style:paragraph-properties/>
    </style:style>
    <style:style style:family="table-cell" style:name="a15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16">
      <style:text-properties fo:font-size="0.33333in" style:font-size-asian="0.33333in" style:font-size-complex="0.33333in" fo:language="en" fo:country="GB" fo:font-weight="bold" style:font-weight-asian="bold" style:font-weight-complex="bold"/>
    </style:style>
    <style:style style:family="paragraph" style:name="a1517">
      <style:paragraph-properties fo:text-align="right"/>
    </style:style>
    <style:style style:family="table-cell" style:name="a15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size="0.33333in" style:font-size-asian="0.33333in" style:font-size-complex="0.33333in" fo:language="en" fo:country="G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size="0.33333in" style:font-size-asian="0.33333in" style:font-size-complex="0.33333in" fo:language="en" fo:country="GB"/>
    </style:style>
    <style:style style:family="paragraph" style:name="a1521">
      <style:paragraph-properties/>
    </style:style>
    <style:style style:family="table-cell" style:name="a15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523">
      <style:table-row-properties style:row-height="0.40556in"/>
    </style:style>
    <style:style style:family="text" style:name="a1524">
      <style:text-properties fo:language="en" fo:country="GB"/>
    </style:style>
    <style:style style:family="text" style:name="a1525">
      <style:text-properties fo:language="en" fo:country="GB"/>
    </style:style>
    <style:style style:family="paragraph" style:name="a1526">
      <style:paragraph-properties/>
    </style:style>
    <style:style style:family="table-cell" style:name="a15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28">
      <style:text-properties fo:language="en" fo:country="GB"/>
    </style:style>
    <style:style style:family="text" style:name="a1529">
      <style:text-properties fo:language="en" fo:country="G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language="en" fo:country="GB"/>
    </style:style>
    <style:style style:family="paragraph" style:name="a1531">
      <style:paragraph-properties fo:text-align="right"/>
    </style:style>
    <style:style style:family="table-cell" style:name="a15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33">
      <style:text-properties fo:language="en" fo:country="GB"/>
    </style:style>
    <style:style style:family="text" style:name="a1534">
      <style:text-properties fo:language="en" fo:country="GB"/>
    </style:style>
    <style:style style:family="text" style:name="a1535">
      <style:text-properties fo:language="en" fo:country="GB"/>
    </style:style>
    <style:style style:family="text" style:name="a1536">
      <style:text-properties fo:language="en" fo:country="GB"/>
    </style:style>
    <style:style style:family="text" style:name="a1537">
      <style:text-properties fo:language="en" fo:country="GB"/>
    </style:style>
    <style:style style:family="text" style:name="a1538">
      <style:text-properties fo:language="en" fo:country="GB"/>
    </style:style>
    <style:style style:family="text" style:name="a1539">
      <style:text-properties fo:language="en" fo:country="GB"/>
    </style:style>
    <style:style style:family="paragraph" style:name="a1030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language="en" fo:country="GB"/>
    </style:style>
    <style:style style:family="text" style:name="a1541">
      <style:text-properties fo:language="en" fo:country="GB"/>
    </style:style>
    <style:style style:family="text" style:name="a1542">
      <style:text-properties fo:language="en" fo:country="GB"/>
    </style:style>
    <style:style style:family="text" style:name="a1543">
      <style:text-properties fo:language="en" fo:country="GB"/>
    </style:style>
    <style:style style:family="text" style:name="a1544">
      <style:text-properties fo:language="en" fo:country="GB"/>
    </style:style>
    <style:style style:family="text" style:name="a1545">
      <style:text-properties fo:language="en" fo:country="GB"/>
    </style:style>
    <style:style style:family="text" style:name="a1546">
      <style:text-properties fo:language="en" fo:country="GB"/>
    </style:style>
    <style:style style:family="paragraph" style:name="a1547">
      <style:paragraph-properties/>
    </style:style>
    <style:style style:family="table-cell" style:name="a15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549">
      <style:table-row-properties style:row-height="0.40556in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 style:parent-style-name="Graphics">
      <style:graphic-properties draw:fill="none" draw:stroke="non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bitmap" draw:fill-image-name="a905" style:repeat="stretch" draw:opacity="45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language="en" fo:country="GB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language="en" fo:country="GB"/>
    </style:style>
    <style:style style:family="paragraph" style:name="a1552">
      <style:paragraph-properties/>
    </style:style>
    <style:style style:family="table-cell" style:name="a15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54">
      <style:text-properties fo:language="en" fo:country="GB"/>
    </style:style>
    <style:style style:family="text" style:name="a1555">
      <style:text-properties fo:language="en" fo:country="GB"/>
    </style:style>
    <style:style style:family="text" style:name="a1556">
      <style:text-properties fo:language="en" fo:country="GB"/>
    </style:style>
    <style:style style:family="paragraph" style:name="a1557">
      <style:paragraph-properties fo:text-align="right"/>
    </style:style>
    <style:style style:family="table-cell" style:name="a15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59">
      <style:text-properties fo:language="en" fo:country="G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 style:parent-style-name="Graphics">
      <style:graphic-properties draw:fill="none" draw:stroke="non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562">
      <style:table-row-properties style:row-height="0.40556in"/>
    </style:style>
    <style:style style:family="text" style:name="a1563">
      <style:text-properties fo:language="en" fo:country="GB"/>
    </style:style>
    <style:style style:family="paragraph" style:name="a1564">
      <style:paragraph-properties/>
    </style:style>
    <style:style style:family="table-cell" style:name="a15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66">
      <style:text-properties fo:language="en" fo:country="GB"/>
    </style:style>
    <style:style style:family="paragraph" style:name="a1567">
      <style:paragraph-properties fo:text-align="right"/>
    </style:style>
    <style:style style:family="table-cell" style:name="a15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69">
      <style:text-properties fo:language="en" fo:country="G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7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572">
      <style:table-row-properties style:row-height="0.40556in"/>
    </style:style>
    <style:style style:family="text" style:name="a1573">
      <style:text-properties fo:language="en" fo:country="GB"/>
    </style:style>
    <style:style style:family="paragraph" style:name="a1574">
      <style:paragraph-properties/>
    </style:style>
    <style:style style:family="table-cell" style:name="a157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76">
      <style:text-properties fo:language="en" fo:country="GB"/>
    </style:style>
    <style:style style:family="paragraph" style:name="a1577">
      <style:paragraph-properties fo:text-align="right"/>
    </style:style>
    <style:style style:family="table-cell" style:name="a157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79">
      <style:text-properties fo:language="en" fo:country="G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82">
      <style:table-row-properties style:row-height="0.40556in"/>
    </style:style>
    <style:style style:family="text" style:name="a1583">
      <style:text-properties fo:language="en" fo:country="GB"/>
    </style:style>
    <style:style style:family="paragraph" style:name="a1584">
      <style:paragraph-properties/>
    </style:style>
    <style:style style:family="table-cell" style:name="a15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86">
      <style:text-properties fo:language="en" fo:country="GB"/>
    </style:style>
    <style:style style:family="paragraph" style:name="a1587">
      <style:paragraph-properties fo:text-align="right"/>
    </style:style>
    <style:style style:family="table-cell" style:name="a158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89">
      <style:text-properties fo:language="en" fo:country="G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92">
      <style:table-row-properties style:row-height="0.40556in"/>
    </style:style>
    <style:style style:family="text" style:name="a1593">
      <style:text-properties fo:language="en" fo:country="GB"/>
    </style:style>
    <style:style style:family="text" style:name="a1594">
      <style:text-properties fo:language="en" fo:country="GB"/>
    </style:style>
    <style:style style:family="text" style:name="a1595">
      <style:text-properties fo:language="en" fo:country="GB"/>
    </style:style>
    <style:style style:family="paragraph" style:name="a1596">
      <style:paragraph-properties/>
    </style:style>
    <style:style style:family="table-cell" style:name="a159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98">
      <style:text-properties fo:language="en" fo:country="GB"/>
    </style:style>
    <style:style style:family="paragraph" style:name="a1599">
      <style:paragraph-properties fo:text-align="right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8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0">
      <style:drawing-page-properties draw:fill="bitmap" draw:fill-image-name="a1999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3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5">
      <style:drawing-page-properties draw:fill="bitmap" draw:fill-image-name="a1964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1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2">
      <style:drawing-page-properties draw:fill="bitmap" draw:fill-image-name="a1801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9">
      <style:drawing-page-properties draw:fill="bitmap" draw:fill-image-name="a1308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9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4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9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5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89" draw:master-page-name="Master1-Layout1-title-Заглавен-слайд" presentation:presentation-page-layout-name="Master1-PPL1" draw:id="Slide-256">
        <draw:frame draw:id="id118" presentation:style-name="a894" draw:name="Title 1" svg:x="1.94386in" svg:y="0.8774in" svg:width="9.44562in" svg:height="2.77934in" presentation:class="title" presentation:placeholder="false">
          <draw:text-box>
            <text:p text:style-name="a893" text:class-names="" text:cond-style-name=""><text:span text:style-name="a890" text:class-names="">Разработване на урок на тема: Задължения на водача.</text:span><text:span text:style-name="a891" text:class-names=""><text:line-break/></text:span><text:span text:style-name="a892" text:class-names=""/></text:p>
          </draw:text-box>
          <svg:title/>
          <svg:desc/>
        </draw:frame>
        <draw:frame draw:id="id119" presentation:style-name="a903" draw:name="Subtitle 2" svg:x="1.94386in" svg:y="3.90985in" svg:width="9.44562in" svg:height="1.06914in" presentation:class="subtitle" presentation:placeholder="false">
          <draw:text-box>
            <text:p text:style-name="a896" text:class-names="" text:cond-style-name=""><text:span text:style-name="a895" text:class-names="">ИзГОТВИЛ: Алекс Борисов първанов <text:s text:c="5"/></text:span></text:p>
            <text:p text:style-name="a898" text:class-names="" text:cond-style-name=""><text:span text:style-name="a897" text:class-names="">Курс: 753 <text:s text:c="15"/></text:span></text:p>
            <text:p text:style-name="a900" text:class-names="" text:cond-style-name=""><text:span text:style-name="a899" text:class-names=""/></text:p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20" draw:style-name="a904" draw:name="Graphic 4" svg:x="9.96005in" svg:y="2.1752in" svg:width="1.5748in" svg:height="1.5748in" style:rel-width="scale" style:rel-height="scale">
          <draw:image xlink:href="media/image1.svg" xlink:type="simple" xlink:show="embed" xlink:actuate="onLoad"/>
          <svg:title/>
          <svg:desc>Brain in head icon
</svg:desc>
        </draw:frame>
      </draw:page>
      <draw:page draw:name="Slide2" draw:style-name="a906" draw:master-page-name="Master1-Layout2-cust-Заглавие-и-съдържание" presentation:presentation-page-layout-name="Master1-PPL2" draw:id="Slide-257">
        <draw:frame draw:id="id121" presentation:style-name="a910" draw:name="Title 1" svg:x="1.41553in" svg:y="0.87983in" svg:width="10.50227in" svg:height="1.14746in" presentation:class="title" presentation:placeholder="false">
          <draw:text-box>
            <text:p text:style-name="a909" text:class-names="" text:cond-style-name=""><text:span text:style-name="a907" text:class-names="">Обща характеристика на урока:</text:span><text:span text:style-name="a908" text:class-names=""/></text:p>
          </draw:text-box>
          <svg:title/>
          <svg:desc/>
        </draw:frame>
        <draw:frame draw:id="id122" draw:style-name="a911" draw:name="Graphic 3" svg:x="10.96704in" svg:y="0.22603in" svg:width="1.22753in" svg:height="1.22753in" style:rel-width="scale" style:rel-height="scale">
          <draw:image xlink:href="media/image2.svg" xlink:type="simple" xlink:show="embed" xlink:actuate="onLoad"/>
          <svg:title/>
          <svg:desc>Lightbulb icon</svg:desc>
        </draw:frame>
        <draw:frame draw:id="id123" presentation:style-name="a1004" draw:name="Content Placeholder 2" svg:x="1.41553in" svg:y="2.20443in" svg:width="10.50227in" svg:height="3.77364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2" text:class-names="">Тема на урока:<text:s text:c="1"/></text:span><text:span text:style-name="a913" text:class-names="">Задължения</text:span><text:span text:style-name="a914" text:class-names=""><text:s text:c="1"/>на<text:s text:c="1"/></text:span><text:span text:style-name="a915" text:class-names="">водача</text:span><text:span text:style-name="a916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19" text:class-names="">Вид на урока:<text:s text:c="1"/></text:span><text:span text:style-name="a920" text:class-names="">Теоритичен</text:span><text:span text:style-name="a921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24" text:class-names="">Целева</text:span><text:span text:style-name="a925" text:class-names=""><text:s text:c="1"/></text:span><text:span text:style-name="a926" text:class-names="">група</text:span><text:span text:style-name="a927" text:class-names="">:<text:s text:c="1"/></text:span><text:span text:style-name="a928" text:class-names="">Курсисти</text:span><text:span text:style-name="a929" text:class-names=""><text:s text:c="1"/>за<text:s text:c="1"/></text:span><text:span text:style-name="a930" text:class-names="">придобиване</text:span><text:span text:style-name="a931" text:class-names=""><text:s text:c="1"/>на<text:s text:c="1"/></text:span><text:span text:style-name="a932" text:class-names="">правоспособност</text:span><text:span text:style-name="a933" text:class-names=""><text:s text:c="1"/>за управление на МПС, категория „B“</text:span></text:p>
              </text:list-item>
            </text:list>
            <text:list text:style-name="a941">
              <text:list-item>
                <text:p text:style-name="a940" text:class-names="" text:cond-style-name=""><text:span text:style-name="a936" text:class-names="">Продължителност</text:span><text:span text:style-name="a937" text:class-names="">: 40–45<text:s text:c="1"/></text:span><text:span text:style-name="a938" text:class-names="">минути</text:span><text:span text:style-name="a939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2" text:class-names="">Форма на обучение:<text:s text:c="1"/></text:span><text:span text:style-name="a943" text:class-names="">Групово</text:span><text:span text:style-name="a944" text:class-names=""><text:s text:c="1"/>обучение</text:span></text:p>
              </text:list-item>
            </text:list>
            <text:list text:style-name="a953">
              <text:list-item>
                <text:p text:style-name="a952" text:class-names="" text:cond-style-name=""><text:span text:style-name="a947" text:class-names="">Място на<text:s text:c="1"/></text:span><text:span text:style-name="a948" text:class-names="">провеждане</text:span><text:span text:style-name="a949" text:class-names="">:<text:s text:c="1"/></text:span><text:span text:style-name="a950" text:class-names="">Учебен</text:span><text:span text:style-name="a951" text:class-names=""><text:s text:c="1"/>кабинет / теоретично занятие</text:span></text:p>
              </text:list-item>
            </text:list>
            <text:list text:style-name="a997">
              <text:list-item>
                <text:p text:style-name="a996" text:class-names="" text:cond-style-name=""><text:span text:style-name="a954" text:class-names="">Урокът</text:span><text:span text:style-name="a955" text:class-names=""><text:s text:c="1"/>е разработен в<text:s text:c="1"/></text:span><text:span text:style-name="a956" text:class-names="">съответствие</text:span><text:span text:style-name="a957" text:class-names=""><text:s text:c="1"/>с<text:s text:c="1"/></text:span><text:span text:style-name="a958" text:class-names="">Наредба</text:span><text:span text:style-name="a959" text:class-names=""><text:s text:c="1"/>№ 37 от 2.08.2002 г. относно<text:s text:c="1"/></text:span><text:span text:style-name="a960" text:class-names="">обучението</text:span><text:span text:style-name="a961" text:class-names=""><text:s text:c="1"/>на<text:s text:c="1"/></text:span><text:span text:style-name="a962" text:class-names="">кандидатите</text:span><text:span text:style-name="a963" text:class-names=""><text:s text:c="1"/>за<text:s text:c="1"/></text:span><text:span text:style-name="a964" text:class-names="">придобиване</text:span><text:span text:style-name="a965" text:class-names=""><text:s text:c="1"/>на<text:s text:c="1"/></text:span><text:span text:style-name="a966" text:class-names="">правоспособност</text:span><text:span text:style-name="a967" text:class-names=""><text:s text:c="1"/>за управление на МПС и с<text:s text:c="1"/></text:span><text:span text:style-name="a968" text:class-names="">изискванията</text:span><text:span text:style-name="a969" text:class-names=""><text:s text:c="1"/>на Закона за<text:s text:c="1"/></text:span><text:span text:style-name="a970" text:class-names="">движението</text:span><text:span text:style-name="a971" text:class-names=""><text:s text:c="1"/>по<text:s text:c="1"/></text:span><text:span text:style-name="a972" text:class-names="">пътищата</text:span><text:span text:style-name="a973" text:class-names="">.<text:s text:c="1"/></text:span><text:span text:style-name="a974" text:class-names="">Темата</text:span><text:span text:style-name="a975" text:class-names=""><text:s text:c="1"/></text:span><text:span text:style-name="a976" text:class-names="">обхваща</text:span><text:span text:style-name="a977" text:class-names=""><text:s text:c="1"/></text:span><text:span text:style-name="a978" text:class-names="">основни</text:span><text:span text:style-name="a979" text:class-names=""><text:s text:c="1"/></text:span><text:span text:style-name="a980" text:class-names="">задължения</text:span><text:span text:style-name="a981" text:class-names=""><text:s text:c="1"/>на<text:s text:c="1"/></text:span><text:span text:style-name="a982" text:class-names="">водача</text:span><text:span text:style-name="a983" text:class-names="">, свързани с<text:s text:c="1"/></text:span><text:span text:style-name="a984" text:class-names="">безопасността</text:span><text:span text:style-name="a985" text:class-names="">,<text:s text:c="1"/></text:span><text:span text:style-name="a986" text:class-names="">отговорното</text:span><text:span text:style-name="a987" text:class-names=""><text:s text:c="1"/>поведение и<text:s text:c="1"/></text:span><text:span text:style-name="a988" text:class-names="">опазването</text:span><text:span text:style-name="a989" text:class-names=""><text:s text:c="1"/>на живота и<text:s text:c="1"/></text:span><text:span text:style-name="a990" text:class-names="">здравето</text:span><text:span text:style-name="a991" text:class-names=""><text:s text:c="1"/>на<text:s text:c="1"/></text:span><text:span text:style-name="a992" text:class-names="">участниците</text:span><text:span text:style-name="a993" text:class-names=""><text:s text:c="1"/>в<text:s text:c="1"/></text:span><text:span text:style-name="a994" text:class-names="">движението</text:span><text:span text:style-name="a995" text:class-names="">.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</draw:page>
      <draw:page draw:name="Slide21" draw:style-name="a1006" draw:master-page-name="Master1-Layout2-cust-Заглавие-и-съдържание" presentation:presentation-page-layout-name="Master1-PPL2" draw:id="Slide-276">
        <draw:frame draw:id="id124" presentation:style-name="a1137" draw:name="Контейнер за съдържание 1" svg:x="1.01553in" svg:y="2.17443in" svg:width="10.50227in" svg:height="3.77364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07" text:class-names="">След<text:s text:c="1"/></text:span><text:span text:style-name="a1008" text:class-names="">приключване</text:span><text:span text:style-name="a1009" text:class-names=""><text:s text:c="1"/>на<text:s text:c="1"/></text:span><text:span text:style-name="a1010" text:class-names="">урока</text:span><text:span text:style-name="a1011" text:class-names=""><text:s text:c="1"/>от</text:span><text:span text:style-name="a1012" text:class-names=""><text:s text:c="1"/></text:span><text:span text:style-name="a1013" text:class-names="">курсистите</text:span><text:span text:style-name="a1014" text:class-names=""><text:s text:c="1"/>се<text:s text:c="1"/></text:span><text:span text:style-name="a1015" text:class-names="">очаква</text:span><text:span text:style-name="a1016" text:class-names=""><text:s text:c="1"/>да могат: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19" text:class-names="">Да<text:s text:c="1"/></text:span><text:span text:style-name="a1020" text:class-names="">познават</text:span><text:span text:style-name="a1021" text:class-names=""><text:s text:c="1"/></text:span><text:span text:style-name="a1022" text:class-names="">основните</text:span><text:span text:style-name="a1023" text:class-names=""><text:s text:c="1"/></text:span><text:span text:style-name="a1024" text:class-names="">задължения</text:span><text:span text:style-name="a1025" text:class-names=""><text:s text:c="1"/>на<text:s text:c="1"/></text:span><text:span text:style-name="a1026" text:class-names="">водача</text:span><text:span text:style-name="a1027" text:class-names=""><text:s text:c="1"/>преди<text:s text:c="1"/></text:span><text:span text:style-name="a1028" text:class-names="">потегляне</text:span><text:span text:style-name="a1029" text:class-names=""><text:s text:c="1"/>и по време на управление на МПС;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32" text:class-names="">Да</text:span><text:span text:style-name="a1033" text:class-names=""><text:s text:c="1"/></text:span><text:span text:style-name="a1034" text:class-names="">демонстрират</text:span><text:span text:style-name="a1035" text:class-names=""><text:s text:c="1"/></text:span><text:span text:style-name="a1036" text:class-names="">значението</text:span><text:span text:style-name="a1037" text:class-names=""><text:s text:c="1"/></text:span><text:span text:style-name="a1038" text:class-names="">на<text:s text:c="1"/></text:span><text:span text:style-name="a1039" text:class-names="">проверката</text:span><text:span text:style-name="a1040" text:class-names=""><text:s text:c="1"/>на<text:s text:c="1"/></text:span><text:span text:style-name="a1041" text:class-names="">техническото</text:span><text:span text:style-name="a1042" text:class-names=""><text:s text:c="1"/>състояние на<text:s text:c="1"/></text:span><text:span text:style-name="a1043" text:class-names="">превозното</text:span><text:span text:style-name="a1044" text:class-names=""><text:s text:c="1"/>средство преди<text:s text:c="1"/></text:span><text:span text:style-name="a1045" text:class-names="">експлоатация</text:span><text:span text:style-name="a1046" text:class-names="">.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49" text:class-names="">Да<text:s text:c="1"/></text:span><text:span text:style-name="a1050" text:class-names="">показват</text:span><text:span text:style-name="a1051" text:class-names=""><text:s text:c="1"/></text:span><text:span text:style-name="a1052" text:class-names="">правилното</text:span><text:span text:style-name="a1053" text:class-names=""><text:s text:c="1"/></text:span><text:span text:style-name="a1054" text:class-names="">поведение на<text:s text:c="1"/></text:span><text:span text:style-name="a1055" text:class-names="">водача</text:span><text:span text:style-name="a1056" text:class-names=""><text:s text:c="1"/>при движение,<text:s text:c="1"/></text:span><text:span text:style-name="a1057" text:class-names="">маневриране</text:span><text:span text:style-name="a1058" text:class-names="">,<text:s text:c="1"/></text:span><text:span text:style-name="a1059" text:class-names="">преминаване</text:span><text:span text:style-name="a1060" text:class-names=""><text:s text:c="1"/>през<text:s text:c="1"/></text:span><text:span text:style-name="a1061" text:class-names="">кръстовища</text:span><text:span text:style-name="a1062" text:class-names=""><text:s text:c="1"/>и други<text:s text:c="1"/></text:span><text:span text:style-name="a1063" text:class-names="">пътни</text:span><text:span text:style-name="a1064" text:class-names=""><text:s text:c="1"/>ситуации.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67" text:class-names="">Да<text:s text:c="1"/></text:span><text:span text:style-name="a1068" text:class-names="">демонстрира</text:span><text:span text:style-name="a1069" text:class-names="">т</text:span><text:span text:style-name="a1070" text:class-names=""><text:s text:c="1"/></text:span><text:span text:style-name="a1071" text:class-names="">необходимостта</text:span><text:span text:style-name="a1072" text:class-names=""><text:s text:c="1"/></text:span><text:span text:style-name="a1073" text:class-names="">от<text:s text:c="1"/></text:span><text:span text:style-name="a1074" text:class-names="">повишено</text:span><text:span text:style-name="a1075" text:class-names=""><text:s text:c="1"/>внимание към<text:s text:c="1"/></text:span><text:span text:style-name="a1076" text:class-names="">уязвимите</text:span><text:span text:style-name="a1077" text:class-names=""><text:s text:c="1"/></text:span><text:span text:style-name="a1078" text:class-names="">участници</text:span><text:span text:style-name="a1079" text:class-names=""><text:s text:c="1"/>в<text:s text:c="1"/></text:span><text:span text:style-name="a1080" text:class-names="">движението</text:span><text:span text:style-name="a1081" text:class-names="">.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084" text:class-names="">Да</text:span><text:span text:style-name="a1085" text:class-names=""><text:s text:c="1"/></text:span><text:span text:style-name="a1086" text:class-names="">познават</text:span><text:span text:style-name="a1087" text:class-names=""><text:s text:c="1"/></text:span><text:span text:style-name="a1088" text:class-names=""><text:s text:c="1"/></text:span><text:span text:style-name="a1089" text:class-names="">рисковете</text:span><text:span text:style-name="a1090" text:class-names=""><text:s text:c="1"/></text:span><text:span text:style-name="a1091" text:class-names="">от умора,<text:s text:c="1"/></text:span><text:span text:style-name="a1092" text:class-names="">агресия</text:span><text:span text:style-name="a1093" text:class-names="">,<text:s text:c="1"/></text:span><text:span text:style-name="a1094" text:class-names="">силни</text:span><text:span text:style-name="a1095" text:class-names=""><text:s text:c="1"/></text:span><text:span text:style-name="a1096" text:class-names="">емоции</text:span><text:span text:style-name="a1097" text:class-names="">,<text:s text:c="1"/></text:span><text:span text:style-name="a1098" text:class-names="">алкохол</text:span><text:span text:style-name="a1099" text:class-names=""><text:s text:c="1"/>и<text:s text:c="1"/></text:span><text:span text:style-name="a1100" text:class-names="">упойващи</text:span><text:span text:style-name="a1101" text:class-names=""><text:s text:c="1"/>вещества при управление.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04" text:class-names="">Да<text:s text:c="1"/></text:span><text:span text:style-name="a1105" text:class-names="">познават</text:span><text:span text:style-name="a1106" text:class-names=""><text:s text:c="1"/></text:span><text:span text:style-name="a1107" text:class-names="">задълженията</text:span><text:span text:style-name="a1108" text:class-names=""><text:s text:c="1"/></text:span><text:span text:style-name="a1109" text:class-names="">на<text:s text:c="1"/></text:span><text:span text:style-name="a1110" text:class-names="">водача</text:span><text:span text:style-name="a1111" text:class-names=""><text:s text:c="1"/>към<text:s text:c="1"/></text:span><text:span text:style-name="a1112" text:class-names="">пътниците</text:span><text:span text:style-name="a1113" text:class-names="">, товара и<text:s text:c="1"/></text:span><text:span text:style-name="a1114" text:class-names="">превозното</text:span><text:span text:style-name="a1115" text:class-names=""><text:s text:c="1"/>средство.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18" text:class-names="">Да<text:s text:c="1"/></text:span><text:span text:style-name="a1119" text:class-names="">демонстрират</text:span><text:span text:style-name="a1120" text:class-names=""><text:s text:c="1"/></text:span><text:span text:style-name="a1121" text:class-names="">основните</text:span><text:span text:style-name="a1122" text:class-names=""><text:s text:c="1"/></text:span><text:span text:style-name="a1123" text:class-names="">действия на<text:s text:c="1"/></text:span><text:span text:style-name="a1124" text:class-names="">водача</text:span><text:span text:style-name="a1125" text:class-names=""><text:s text:c="1"/>при<text:s text:c="1"/></text:span><text:span text:style-name="a1126" text:class-names="">възникване</text:span><text:span text:style-name="a1127" text:class-names=""><text:s text:c="1"/>на<text:s text:c="1"/></text:span><text:span text:style-name="a1128" text:class-names="">пътнотранспортно</text:span><text:span text:style-name="a1129" text:class-names=""><text:s text:c="1"/></text:span><text:span text:style-name="a1130" text:class-names="">произшествие</text:span><text:span text:style-name="a1131" text:class-names="">.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</draw:text-box>
          <svg:title/>
          <svg:desc/>
        </draw:frame>
        <draw:frame draw:id="id125" presentation:style-name="a1141" draw:name="Заглавие 2" svg:x="1.41553in" svg:y="0.87983in" svg:width="10.50227in" svg:height="1.14746in" presentation:class="title" presentation:placeholder="false">
          <draw:text-box>
            <text:p text:style-name="a1140" text:class-names="" text:cond-style-name=""><text:span text:style-name="a1138" text:class-names="">2. Основна цел на урока</text:span><text:span text:style-name="a1139" text:class-names=""/></text:p>
          </draw:text-box>
          <svg:title/>
          <svg:desc/>
        </draw:frame>
      </draw:page>
      <draw:page draw:name="Slide10" draw:style-name="a1143" draw:master-page-name="Master1-Layout2-cust-Заглавие-и-съдържание" presentation:presentation-page-layout-name="Master1-PPL2" draw:id="Slide-265">
        <draw:frame draw:id="id126" presentation:style-name="a1198" draw:name="Контейнер за съдържание 1" svg:x="1.41553in" svg:y="2.20443in" svg:width="10.50227in" svg:height="3.77364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44" text:class-names="">Чрез урока се цели да се<text:s text:c="1"/></text:span><text:span text:style-name="a1145" text:class-names="">формира</text:span><text:span text:style-name="a1146" text:class-names="">т</text:span><text:span text:style-name="a1147" text:class-names=""><text:s text:c="1"/></text:span><text:span text:style-name="a1148" text:class-names="">у<text:s text:c="1"/></text:span><text:span text:style-name="a1149" text:class-names="">курсистите</text:span><text:span text:style-name="a1150" text:class-names=""><text:s text:c="1"/>следните качества</text:span><text:span text:style-name="a1151" text:class-names="">:</text:span><text:span text:style-name="a1152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55" text:class-names="">Да<text:s text:c="1"/></text:span><text:span text:style-name="a1156" text:class-names="">показват</text:span><text:span text:style-name="a1157" text:class-names=""><text:s text:c="1"/></text:span><text:span text:style-name="a1158" text:class-names="">чувство<text:s text:c="1"/></text:span><text:span text:style-name="a1159" text:class-names="">за отговорност към себе си и останалите участници в движението;</text:span><text:span text:style-name="a1160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3" text:class-names="">Да<text:s text:c="1"/></text:span><text:span text:style-name="a1164" text:class-names="">демонстрират</text:span><text:span text:style-name="a1165" text:class-names=""><text:s text:c="1"/>уважение<text:s text:c="1"/></text:span><text:span text:style-name="a1166" text:class-names="">към<text:s text:c="1"/></text:span><text:span text:style-name="a1167" text:class-names="">закона и правилата за движение;</text:span><text:span text:style-name="a1168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1" text:class-names="">Да<text:s text:c="1"/></text:span><text:span text:style-name="a1172" text:class-names="">демонстратират</text:span><text:span text:style-name="a1173" text:class-names=""><text:s text:c="1"/></text:span><text:span text:style-name="a1174" text:class-names="">дисциплина<text:s text:c="1"/></text:span><text:span text:style-name="a1175" text:class-names="">и самоконтрол при управление на автомобил;</text:span><text:span text:style-name="a1176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79" text:class-names="">Да</text:span><text:span text:style-name="a1180" text:class-names=""><text:s text:c="1"/>показват<text:s text:c="1"/></text:span><text:span text:style-name="a1181" text:class-names="">толерантност<text:s text:c="1"/></text:span><text:span text:style-name="a1182" text:class-names="">към пешеходци, велосипедисти, мотористи, начинаещи и възрастни водачи;</text:span><text:span text:style-name="a1183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86" text:class-names="">Да</text:span><text:span text:style-name="a1187" text:class-names=""><text:s text:c="1"/></text:span><text:span text:style-name="a1188" text:class-names="">демонстратират</text:span><text:span text:style-name="a1189" text:class-names=""><text:s text:c="1"/></text:span><text:span text:style-name="a1190" text:class-names="">разбиране</text:span><text:span text:style-name="a1191" text:class-names="">, че безопасността е по-важна от бързината и личното удобство.</text:span><text:span text:style-name="a1192" text:class-names=""/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  <draw:frame draw:id="id127" presentation:style-name="a1202" draw:name="Заглавие 2" svg:x="1.41553in" svg:y="0.87983in" svg:width="10.50227in" svg:height="1.14746in" presentation:class="title" presentation:placeholder="false">
          <draw:text-box>
            <text:p text:style-name="a1201" text:class-names="" text:cond-style-name=""><text:span text:style-name="a1199" text:class-names="">3. Възпитателни цели</text:span><text:span text:style-name="a1200" text:class-names=""><text:line-break/></text:span></text:p>
          </draw:text-box>
          <svg:title/>
          <svg:desc/>
        </draw:frame>
      </draw:page>
      <draw:page draw:name="Slide11" draw:style-name="a1204" draw:master-page-name="Master1-Layout5-cust-Сравнение" presentation:presentation-page-layout-name="Master1-PPL5" draw:id="Slide-266">
        <draw:frame draw:id="id128" presentation:style-name="a1212" draw:name="Текстов контейнер 1" svg:x="7.3512in" svg:y="2.46262in" svg:width="5.08in" svg:height="0.87702in" presentation:class="outline" presentation:placeholder="false">
          <draw:text-box>
            <text:list text:style-name="a1208">
              <text:list-item>
                <text:p text:style-name="a1207" text:class-names="" text:cond-style-name=""><text:span text:style-name="a1205" text:class-names="">5. Практически цели</text:span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</draw:text-box>
          <svg:title/>
          <svg:desc/>
        </draw:frame>
        <draw:frame draw:id="id129" presentation:style-name="a1223" draw:name="Контейнер за съдържание 2" svg:x="7.00893in" svg:y="2.90129in" svg:width="5.08in" svg:height="2.89201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  <text:list text:style-name="a1219">
              <text:list-item>
                <text:p text:style-name="a1218" text:class-names="" text:cond-style-name=""><text:span text:style-name="a1216" text:class-names="">След урока курсистите трябва да могат да прилагат знанията си в реални пътни ситуации. Да умеят да преценяват кога едно поведение е правилно и кога създава риск.</text:span><text:span text:style-name="a1217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</draw:text-box>
          <svg:title/>
          <svg:desc/>
        </draw:frame>
        <draw:frame draw:id="id130" presentation:style-name="a1231" draw:name="Текстов контейнер 3" svg:x="1.58666in" svg:y="2.46262in" svg:width="5.08in" svg:height="0.87734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24" text:class-names="">4. Очаквани резултати от обучението</text:span><text:span text:style-name="a1225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</draw:text-box>
          <svg:title/>
          <svg:desc/>
        </draw:frame>
        <draw:frame draw:id="id131" presentation:style-name="a1306" draw:name="Контейнер за съдържание 4" svg:x="1.41553in" svg:y="3.10467in" svg:width="5.08in" svg:height="2.88426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32" text:class-names="">След<text:s text:c="1"/></text:span><text:span text:style-name="a1233" text:class-names="">приключване</text:span><text:span text:style-name="a1234" text:class-names=""><text:s text:c="1"/>на урока<text:s text:c="1"/></text:span><text:span text:style-name="a1235" text:class-names="">курсистите</text:span><text:span text:style-name="a1236" text:class-names=""><text:s text:c="1"/>трябва да<text:s text:c="1"/></text:span><text:span text:style-name="a1237" text:class-names="">са</text:span><text:span text:style-name="a1238" text:class-names=""><text:s text:c="1"/></text:span><text:span text:style-name="a1239" text:class-names="">постигнали</text:span><text:span text:style-name="a1240" text:class-names=""><text:s text:c="1"/></text:span><text:span text:style-name="a1241" text:class-names="">следните</text:span><text:span text:style-name="a1242" text:class-names=""><text:s text:c="1"/></text:span><text:span text:style-name="a1243" text:class-names="">резултати</text:span><text:span text:style-name="a1244" text:class-names="">: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47" text:class-names="">Да<text:s text:c="1"/></text:span><text:span text:style-name="a1248" text:class-names="">показват</text:span><text:span text:style-name="a1249" text:class-names="">,</text:span><text:span text:style-name="a1250" text:class-names=""><text:s text:c="1"/></text:span><text:span text:style-name="a1251" text:class-names="">че</text:span><text:span text:style-name="a1252" text:class-names=""><text:s text:c="1"/></text:span><text:span text:style-name="a1253" text:class-names="">знаят</text:span><text:span text:style-name="a1254" text:class-names=""><text:s text:c="1"/></text:span><text:span text:style-name="a1255" text:class-names="">основните</text:span><text:span text:style-name="a1256" text:class-names=""><text:s text:c="1"/></text:span><text:span text:style-name="a1257" text:class-names="">задължения</text:span><text:span text:style-name="a1258" text:class-names=""><text:s text:c="1"/>на<text:s text:c="1"/></text:span><text:span text:style-name="a1259" text:class-names="">водача</text:span><text:span text:style-name="a1260" text:class-names="">;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63" text:class-names="">Да<text:s text:c="1"/></text:span><text:span text:style-name="a1264" text:class-names="">демонстрират</text:span><text:span text:style-name="a1265" text:class-names=""><text:s text:c="1"/></text:span><text:span text:style-name="a1266" text:class-names="">разбир</text:span><text:span text:style-name="a1267" text:class-names="">ане</text:span><text:span text:style-name="a1268" text:class-names=""><text:s text:c="1"/></text:span><text:span text:style-name="a1269" text:class-names="">защо</text:span><text:span text:style-name="a1270" text:class-names=""><text:s text:c="1"/>тези<text:s text:c="1"/></text:span><text:span text:style-name="a1271" text:class-names="">задължения</text:span><text:span text:style-name="a1272" text:class-names=""><text:s text:c="1"/></text:span><text:span text:style-name="a1273" text:class-names="">са</text:span><text:span text:style-name="a1274" text:class-names=""><text:s text:c="1"/>важни;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77" text:class-names="">Че<text:s text:c="1"/></text:span><text:span text:style-name="a1278" text:class-names="">могат<text:s text:c="1"/></text:span><text:span text:style-name="a1279" text:class-names="">да<text:s text:c="1"/></text:span><text:span text:style-name="a1280" text:class-names="">дадат</text:span><text:span text:style-name="a1281" text:class-names=""><text:s text:c="1"/></text:span><text:span text:style-name="a1282" text:class-names="">примери</text:span><text:span text:style-name="a1283" text:class-names=""><text:s text:c="1"/>за<text:s text:c="1"/></text:span><text:span text:style-name="a1284" text:class-names="">правилно</text:span><text:span text:style-name="a1285" text:class-names=""><text:s text:c="1"/>и<text:s text:c="1"/></text:span><text:span text:style-name="a1286" text:class-names="">неправилно</text:span><text:span text:style-name="a1287" text:class-names=""><text:s text:c="1"/>поведение на<text:s text:c="1"/></text:span><text:span text:style-name="a1288" text:class-names="">водача</text:span><text:span text:style-name="a1289" text:class-names="">;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292" text:class-names="">Да<text:s text:c="1"/></text:span><text:span text:style-name="a1293" text:class-names="">показват</text:span><text:span text:style-name="a1294" text:class-names=""><text:s text:c="1"/></text:span><text:span text:style-name="a1295" text:class-names="">осъзнатост</text:span><text:span text:style-name="a1296" text:class-names="">,<text:s text:c="1"/></text:span><text:span text:style-name="a1297" text:class-names="">че всяко нарушение<text:s text:c="1"/></text:span><text:span text:style-name="a1298" text:class-names="">може</text:span><text:span text:style-name="a1299" text:class-names=""><text:s text:c="1"/>да<text:s text:c="1"/></text:span><text:span text:style-name="a1300" text:class-names="">доведе</text:span><text:span text:style-name="a1301" text:class-names=""><text:s text:c="1"/>до<text:s text:c="1"/></text:span><text:span text:style-name="a1302" text:class-names="">опасност</text:span><text:span text:style-name="a1303" text:class-names="">;</text:span></text:p>
              </text:list-item>
            </text:list>
          </draw:text-box>
          <svg:title/>
          <svg:desc/>
        </draw:frame>
        <draw:frame draw:id="id132" presentation:style-name="a1307" draw:name="Заглавие 5" svg:x="1.58666in" svg:y="0.85262in" svg:width="10.50227in" svg:height="1.14746in" presentation:class="title" presentation:placeholder="true">
          <draw:text-box/>
          <svg:title/>
          <svg:desc/>
        </draw:frame>
      </draw:page>
      <draw:page draw:name="Slide12" draw:style-name="a1309" draw:master-page-name="Master1-Layout2-cust-Заглавие-и-съдържание" presentation:presentation-page-layout-name="Master1-PPL2" draw:id="Slide-267">
        <draw:frame draw:id="id133" presentation:style-name="a1333" draw:name="Контейнер за съдържание 1" svg:x="1.41553in" svg:y="2.20443in" svg:width="10.50227in" svg:height="3.77364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0" text:class-names="">В урока се въвеждат и обясняват следните понятия: </text:span><text:span text:style-name="a1311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4" text:class-names="">Водач — лице, което управлява пътно превозно средство.</text:span><text:span text:style-name="a1315" text:class-names=""/></text:p>
              </text:list-item>
            </text:list>
            <text:list text:style-name="a1321">
              <text:list-item>
                <text:p text:style-name="a1320" text:class-names="" text:cond-style-name=""><text:span text:style-name="a1318" text:class-names="">Участник в движението — всяко лице, което се намира на пътя и участва в движението като водач, пешеходец, пътник или по друг начин.<text:s text:c="1"/></text:span><text:span text:style-name="a1319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2" text:class-names="">Задължения на водача — правила и изисквания, които водачът трябва да спазва, за да не създава опасност за себе си и за другите.</text:span><text:span text:style-name="a1323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6" text:class-names="">Безопасност на движението — състояние, при което рискът от пътнотранспортни произшествия е намален чрез спазване на правила, внимание и отговорно поведение.</text:span><text:span text:style-name="a1327" text:class-names=""/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  <draw:frame draw:id="id134" presentation:style-name="a1337" draw:name="Заглавие 2" svg:x="1.41553in" svg:y="0.87983in" svg:width="10.50227in" svg:height="1.14746in" presentation:class="title" presentation:placeholder="false">
          <draw:text-box>
            <text:p text:style-name="a1336" text:class-names="" text:cond-style-name=""><text:span text:style-name="a1334" text:class-names="">6. Основни понятия</text:span><text:span text:style-name="a1335" text:class-names=""><text:line-break/></text:span></text:p>
          </draw:text-box>
          <svg:title/>
          <svg:desc/>
        </draw:frame>
      </draw:page>
      <draw:page draw:name="Slide25" draw:style-name="a1339" draw:master-page-name="Master1-Layout2-cust-Заглавие-и-съдържание" presentation:presentation-page-layout-name="Master1-PPL2" draw:id="Slide-280">
        <draw:frame draw:id="id135" presentation:style-name="a1370" draw:name="Контейнер за съдържание 1" svg:x="0.3374in" svg:y="2.14193in" svg:width="7.56885in" svg:height="3.77364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В урока могат да се използват следните методи: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устно изложение;<text:s text:c="1"/>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беседа;<text:s text:c="1"/>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дискусия;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работа с казуси;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задаване на въпроси;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обобщение;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даване на практически примери.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</draw:text-box>
          <svg:title/>
          <svg:desc/>
        </draw:frame>
        <draw:frame draw:id="id136" presentation:style-name="a1380" draw:name="Заглавие 2" svg:x="1.41553in" svg:y="0.87983in" svg:width="10.50227in" svg:height="1.14746in" presentation:class="title" presentation:placeholder="false">
          <draw:text-box>
            <text:p text:style-name="a1379" text:class-names="" text:cond-style-name=""><text:span text:style-name="a1371" text:class-names="">Дидактически<text:s text:c="1"/></text:span><text:span text:style-name="a1372" text:class-names="">Методи</text:span><text:span text:style-name="a1373" text:class-names=""><text:s text:c="1"/></text:span><text:span text:style-name="a1374" text:class-names="">на</text:span><text:span text:style-name="a1375" text:class-names=""><text:s text:c="1"/></text:span><text:span text:style-name="a1376" text:class-names="">обучение</text:span><text:span text:style-name="a1377" text:class-names=""><text:line-break/></text:span><text:span text:style-name="a1378" text:class-names=""/></text:p>
          </draw:text-box>
          <svg:title/>
          <svg:desc/>
        </draw:frame>
        <draw:frame draw:id="id137" draw:style-name="a1383" draw:name="Текстово поле 3" svg:x="7.90625in" svg:y="3.43972in" svg:width="4.01155in" svg:height="1.17806in">
          <draw:text-box>
            <text:p text:style-name="a1382" text:class-names="" text:cond-style-name=""><text:span text:style-name="a1381" text:class-names="">Методите са избрани така, че курсистите да не бъдат само пасивни слушатели, а да участват активно чрез разсъждение върху реални ситуации.</text:span></text:p>
          </draw:text-box>
          <svg:title/>
          <svg:desc/>
        </draw:frame>
        <presentation:notes draw:style-name="a1389">
          <draw:page-thumbnail draw:page-number="7" svg:x="0.75in" svg:y="1.25in" svg:width="6in" svg:height="3.375in" presentation:class="page" draw:id="id138" presentation:style-name="a1384" draw:name="Контейнер за изображение на слайда 1">
            <svg:title/>
            <svg:desc/>
          </draw:page-thumbnail>
          <draw:frame draw:id="id139" presentation:style-name="a1385" draw:name="Контейнер за бележки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1388" draw:name="Контейнер за номер на слайда 3" svg:x="4.24826in" svg:y="9.49826in" svg:width="3.25in" svg:height="0.50174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1391" draw:master-page-name="Master1-Layout2-cust-Заглавие-и-съдържание" presentation:presentation-page-layout-name="Master1-PPL2" draw:id="Slide-285">
        <draw:frame draw:id="id141" presentation:style-name="a1498" draw:name="Контейнер за съдържание 1" svg:x="1.41553in" svg:y="2.20443in" svg:width="10.50227in" svg:height="3.77364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392" text:class-names="">В<text:s text:c="1"/></text:span><text:span text:style-name="a1393" text:class-names="">урока</text:span><text:span text:style-name="a1394" text:class-names=""><text:s text:c="1"/></text:span><text:span text:style-name="a1395" text:class-names="">се</text:span><text:span text:style-name="a1396" text:class-names=""><text:s text:c="1"/></text:span><text:span text:style-name="a1397" text:class-names="">прилагат</text:span><text:span text:style-name="a1398" text:class-names=""><text:s text:c="1"/></text:span><text:span text:style-name="a1399" text:class-names="">следните</text:span><text:span text:style-name="a1400" text:class-names=""><text:s text:c="1"/></text:span><text:span text:style-name="a1401" text:class-names="">дидактически</text:span><text:span text:style-name="a1402" text:class-names=""><text:s text:c="1"/></text:span><text:span text:style-name="a1403" text:class-names="">принципи</text:span><text:span text:style-name="a1404" text:class-names="">: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07" text:class-names="">Принцип</text:span><text:span text:style-name="a1408" text:class-names=""><text:s text:c="1"/></text:span><text:span text:style-name="a1409" text:class-names="">на</text:span><text:span text:style-name="a1410" text:class-names=""><text:s text:c="1"/></text:span><text:span text:style-name="a1411" text:class-names="">нагледност</text:span><text:span text:style-name="a1412" text:class-names=""><text:s text:c="1"/>—<text:s text:c="1"/></text:span><text:span text:style-name="a1413" text:class-names="">използване</text:span><text:span text:style-name="a1414" text:class-names=""><text:s text:c="1"/></text:span><text:span text:style-name="a1415" text:class-names="">на</text:span><text:span text:style-name="a1416" text:class-names=""><text:s text:c="1"/></text:span><text:span text:style-name="a1417" text:class-names="">примери</text:span><text:span text:style-name="a1418" text:class-names=""><text:s text:c="1"/>и<text:s text:c="1"/></text:span><text:span text:style-name="a1419" text:class-names="">пътни</text:span><text:span text:style-name="a1420" text:class-names=""><text:s text:c="1"/></text:span><text:span text:style-name="a1421" text:class-names="">ситуации</text:span><text:span text:style-name="a1422" text:class-names="">.<text:s text:c="1"/>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25" text:class-names="">Принцип</text:span><text:span text:style-name="a1426" text:class-names=""><text:s text:c="1"/></text:span><text:span text:style-name="a1427" text:class-names="">на</text:span><text:span text:style-name="a1428" text:class-names=""><text:s text:c="1"/></text:span><text:span text:style-name="a1429" text:class-names="">достъпност</text:span><text:span text:style-name="a1430" text:class-names=""><text:s text:c="1"/>— съдържанието е<text:s text:c="1"/></text:span><text:span text:style-name="a1431" text:class-names="">съобразено</text:span><text:span text:style-name="a1432" text:class-names=""><text:s text:c="1"/>с<text:s text:c="1"/></text:span><text:span text:style-name="a1433" text:class-names="">нивото</text:span><text:span text:style-name="a1434" text:class-names=""><text:s text:c="1"/></text:span><text:span text:style-name="a1435" text:class-names="">на</text:span><text:span text:style-name="a1436" text:class-names=""><text:s text:c="1"/></text:span><text:span text:style-name="a1437" text:class-names="">курсистите</text:span><text:span text:style-name="a1438" text:class-names="">.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41" text:class-names="">Принцип</text:span><text:span text:style-name="a1442" text:class-names=""><text:s text:c="1"/></text:span><text:span text:style-name="a1443" text:class-names="">на</text:span><text:span text:style-name="a1444" text:class-names=""><text:s text:c="1"/></text:span><text:span text:style-name="a1445" text:class-names="">активност</text:span><text:span text:style-name="a1446" text:class-names=""><text:s text:c="1"/>—<text:s text:c="1"/></text:span><text:span text:style-name="a1447" text:class-names="">курсистите</text:span><text:span text:style-name="a1448" text:class-names=""><text:s text:c="1"/></text:span><text:span text:style-name="a1449" text:class-names="">участват</text:span><text:span text:style-name="a1450" text:class-names=""><text:s text:c="1"/>чрез въпроси и<text:s text:c="1"/></text:span><text:span text:style-name="a1451" text:class-names="">казуси</text:span><text:span text:style-name="a1452" text:class-names="">.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55" text:class-names="">Принцип</text:span><text:span text:style-name="a1456" text:class-names=""><text:s text:c="1"/></text:span><text:span text:style-name="a1457" text:class-names="">на</text:span><text:span text:style-name="a1458" text:class-names=""><text:s text:c="1"/></text:span><text:span text:style-name="a1459" text:class-names="">системност</text:span><text:span text:style-name="a1460" text:class-names=""><text:s text:c="1"/>и<text:s text:c="1"/></text:span><text:span text:style-name="a1461" text:class-names="">последователност</text:span><text:span text:style-name="a1462" text:class-names=""><text:s text:c="1"/>—<text:s text:c="1"/></text:span><text:span text:style-name="a1463" text:class-names="">темата</text:span><text:span text:style-name="a1464" text:class-names=""><text:s text:c="1"/></text:span><text:span text:style-name="a1465" text:class-names="">се</text:span><text:span text:style-name="a1466" text:class-names=""><text:s text:c="1"/></text:span><text:span text:style-name="a1467" text:class-names="">разглежда</text:span><text:span text:style-name="a1468" text:class-names=""><text:s text:c="1"/></text:span><text:span text:style-name="a1469" text:class-names="">по</text:span><text:span text:style-name="a1470" text:class-names=""><text:s text:c="1"/></text:span><text:span text:style-name="a1471" text:class-names="">ясен</text:span><text:span text:style-name="a1472" text:class-names=""><text:s text:c="1"/>ред.<text:s text:c="1"/>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75" text:class-names="">Принцип</text:span><text:span text:style-name="a1476" text:class-names=""><text:s text:c="1"/></text:span><text:span text:style-name="a1477" text:class-names="">на</text:span><text:span text:style-name="a1478" text:class-names=""><text:s text:c="1"/></text:span><text:span text:style-name="a1479" text:class-names="">връзка</text:span><text:span text:style-name="a1480" text:class-names=""><text:s text:c="1"/>между<text:s text:c="1"/></text:span><text:span text:style-name="a1481" text:class-names="">теория</text:span><text:span text:style-name="a1482" text:class-names=""><text:s text:c="1"/>и<text:s text:c="1"/></text:span><text:span text:style-name="a1483" text:class-names="">практика</text:span><text:span text:style-name="a1484" text:class-names=""><text:s text:c="1"/>—<text:s text:c="1"/></text:span><text:span text:style-name="a1485" text:class-names="">задълженията</text:span><text:span text:style-name="a1486" text:class-names=""><text:s text:c="1"/></text:span><text:span text:style-name="a1487" text:class-names="">се</text:span><text:span text:style-name="a1488" text:class-names=""><text:s text:c="1"/>свързват с<text:s text:c="1"/></text:span><text:span text:style-name="a1489" text:class-names="">реалното</text:span><text:span text:style-name="a1490" text:class-names=""><text:s text:c="1"/></text:span><text:span text:style-name="a1491" text:class-names="">движение</text:span><text:span text:style-name="a1492" text:class-names="">.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/></text:p>
              </text:list-item>
            </text:list>
          </draw:text-box>
          <svg:title/>
          <svg:desc/>
        </draw:frame>
        <draw:frame draw:id="id142" presentation:style-name="a1504" draw:name="Заглавие 2" svg:x="1.41553in" svg:y="0.87983in" svg:width="10.50227in" svg:height="1.14746in" presentation:class="title" presentation:placeholder="false">
          <draw:text-box>
            <text:p text:style-name="a1503" text:class-names="" text:cond-style-name=""><text:span text:style-name="a1499" text:class-names="">Дидактически</text:span><text:span text:style-name="a1500" text:class-names=""><text:s text:c="1"/></text:span><text:span text:style-name="a1501" text:class-names="">принципи</text:span><text:span text:style-name="a1502" text:class-names=""/></text:p>
          </draw:text-box>
          <svg:title/>
          <svg:desc/>
        </draw:frame>
      </draw:page>
      <draw:page draw:name="Slide31" draw:style-name="a1506" draw:master-page-name="Master1-Layout2-cust-Заглавие-и-съдържание" presentation:presentation-page-layout-name="Master1-PPL2" draw:id="Slide-286">
        <draw:frame draw:id="id143" draw:name="Контейнер за съдържание 9" svg:x="1.505in" svg:y="1.56729in" svg:width="10.925in" svg:height="4.11111in" presentation:class="table" presentation:placeholder="false">
          <table:table table:style-name="a150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08" table:default-cell-style-name=""/>
            <table:table-column table:style-name="a1509" table:default-cell-style-name=""/>
            <table:table-column table:style-name="a1510" table:default-cell-style-name=""/>
            <table:table-row table:style-name="a1511" table:default-cell-style-name="">
              <table:table-cell table:style-name="a1515">
                <text:p text:style-name="a1514" text:class-names="" text:cond-style-name=""><text:span text:style-name="a1512" text:class-names="">Етап</text:span><text:span text:style-name="a1513" text:class-names=""/></text:p>
              </table:table-cell>
              <table:table-cell table:style-name="a1518">
                <text:p text:style-name="a1517" text:class-names="" text:cond-style-name=""><text:span text:style-name="a1516" text:class-names="">Време</text:span></text:p>
              </table:table-cell>
              <table:table-cell table:style-name="a1522">
                <text:p text:style-name="a1521" text:class-names="" text:cond-style-name=""><text:span text:style-name="a1519" text:class-names="">Дейност</text:span><text:span text:style-name="a1520" text:class-names=""/></text:p>
              </table:table-cell>
            </table:table-row>
            <table:table-row table:style-name="a1523" table:default-cell-style-name="">
              <table:table-cell table:style-name="a1527">
                <text:p text:style-name="a1526" text:class-names="" text:cond-style-name=""><text:span text:style-name="a1524" text:class-names="">Организационен</text:span><text:span text:style-name="a1525" text:class-names=""><text:s text:c="1"/>момент</text:span></text:p>
              </table:table-cell>
              <table:table-cell table:style-name="a1532">
                <text:p text:style-name="a1531" text:class-names="" text:cond-style-name=""><text:span text:style-name="a1528" text:class-names="">2<text:s text:c="1"/></text:span><text:span text:style-name="a1529" text:class-names="">мин</text:span><text:span text:style-name="a1530" text:class-names="">.</text:span></text:p>
              </table:table-cell>
              <table:table-cell table:style-name="a1548">
                <text:p text:style-name="a1547" text:class-names="" text:cond-style-name=""><text:span text:style-name="a1533" text:class-names="">Поздрав</text:span><text:span text:style-name="a1534" text:class-names="">,<text:s text:c="1"/></text:span><text:span text:style-name="a1535" text:class-names="">проверка</text:span><text:span text:style-name="a1536" text:class-names=""><text:s text:c="1"/></text:span><text:span text:style-name="a1537" text:class-names="">на</text:span><text:span text:style-name="a1538" text:class-names=""><text:s text:c="1"/></text:span><text:span text:style-name="a1539" text:class-names="">присъствие</text:span><text:span text:style-name="a1540" text:class-names="">,<text:s text:c="1"/></text:span><text:span text:style-name="a1541" text:class-names="">представяне</text:span><text:span text:style-name="a1542" text:class-names=""><text:s text:c="1"/></text:span><text:span text:style-name="a1543" text:class-names="">на</text:span><text:span text:style-name="a1544" text:class-names=""><text:s text:c="1"/></text:span><text:span text:style-name="a1545" text:class-names="">темата</text:span><text:span text:style-name="a1546" text:class-names=""/></text:p>
              </table:table-cell>
            </table:table-row>
            <table:table-row table:style-name="a1549" table:default-cell-style-name="">
              <table:table-cell table:style-name="a1553">
                <text:p text:style-name="a1552" text:class-names="" text:cond-style-name=""><text:span text:style-name="a1550" text:class-names="">Въведение</text:span><text:span text:style-name="a1551" text:class-names=""/></text:p>
              </table:table-cell>
              <table:table-cell table:style-name="a1558">
                <text:p text:style-name="a1557" text:class-names="" text:cond-style-name=""><text:span text:style-name="a1554" text:class-names="">5<text:s text:c="1"/></text:span><text:span text:style-name="a1555" text:class-names="">мин</text:span><text:span text:style-name="a1556" text:class-names="">.</text:span></text:p>
              </table:table-cell>
              <table:table-cell table:style-name="a1561">
                <text:p text:style-name="a1560" text:class-names="" text:cond-style-name=""><text:span text:style-name="a1559" text:class-names="">Кратко насочване към значението на задълженията на водача</text:span></text:p>
              </table:table-cell>
            </table:table-row>
            <table:table-row table:style-name="a1562" table:default-cell-style-name="">
              <table:table-cell table:style-name="a1565">
                <text:p text:style-name="a1564" text:class-names="" text:cond-style-name=""><text:span text:style-name="a1563" text:class-names="">Нов материал</text:span></text:p>
              </table:table-cell>
              <table:table-cell table:style-name="a1568">
                <text:p text:style-name="a1567" text:class-names="" text:cond-style-name=""><text:span text:style-name="a1566" text:class-names="">20 мин.</text:span></text:p>
              </table:table-cell>
              <table:table-cell table:style-name="a1571">
                <text:p text:style-name="a1570" text:class-names="" text:cond-style-name=""><text:span text:style-name="a1569" text:class-names="">Представяне на основните задължения преди, по време и след движение</text:span></text:p>
              </table:table-cell>
            </table:table-row>
            <table:table-row table:style-name="a1572" table:default-cell-style-name="">
              <table:table-cell table:style-name="a1575">
                <text:p text:style-name="a1574" text:class-names="" text:cond-style-name=""><text:span text:style-name="a1573" text:class-names="">Практически задачи</text:span></text:p>
              </table:table-cell>
              <table:table-cell table:style-name="a1578">
                <text:p text:style-name="a1577" text:class-names="" text:cond-style-name=""><text:span text:style-name="a1576" text:class-names="">10 мин.</text:span></text:p>
              </table:table-cell>
              <table:table-cell table:style-name="a1581">
                <text:p text:style-name="a1580" text:class-names="" text:cond-style-name=""><text:span text:style-name="a1579" text:class-names="">Работа по казуси и разпознаване на правилно поведение</text:span></text:p>
              </table:table-cell>
            </table:table-row>
            <table:table-row table:style-name="a1582" table:default-cell-style-name="">
              <table:table-cell table:style-name="a1585">
                <text:p text:style-name="a1584" text:class-names="" text:cond-style-name=""><text:span text:style-name="a1583" text:class-names="">Обобщение</text:span></text:p>
              </table:table-cell>
              <table:table-cell table:style-name="a1588">
                <text:p text:style-name="a1587" text:class-names="" text:cond-style-name=""><text:span text:style-name="a1586" text:class-names="">5 мин.</text:span></text:p>
              </table:table-cell>
              <table:table-cell table:style-name="a1591">
                <text:p text:style-name="a1590" text:class-names="" text:cond-style-name=""><text:span text:style-name="a1589" text:class-names="">Извеждане на най-важните изводи от урока</text:span></text:p>
              </table:table-cell>
            </table:table-row>
            <table:table-row table:style-name="a1592" table:default-cell-style-name="">
              <table:table-cell table:style-name="a1597">
                <text:p text:style-name="a1596" text:class-names="" text:cond-style-name=""><text:span text:style-name="a1593" text:class-names="">Контрол и<text:s text:c="1"/></text:span><text:span text:style-name="a1594" text:class-names="">оценяване</text:span><text:span text:style-name="a1595" text:class-names=""/></text:p>
              </table:table-cell>
              <table:table-cell table:style-name="a1600">
                <text:p text:style-name="a1599" text:class-names="" text:cond-style-name=""><text:span text:style-name="a1598" text:class-names="">3 мин.</text:span></text:p>
              </table:table-cell>
              <table:table-cell table:style-name="a1610">
                <text:p text:style-name="a1609" text:class-names="" text:cond-style-name=""><text:span text:style-name="a1601" text:class-names="">Устни</text:span><text:span text:style-name="a1602" text:class-names=""><text:s text:c="1"/>въпроси и<text:s text:c="1"/></text:span><text:span text:style-name="a1603" text:class-names="">проверка</text:span><text:span text:style-name="a1604" text:class-names=""><text:s text:c="1"/></text:span><text:span text:style-name="a1605" text:class-names="">на</text:span><text:span text:style-name="a1606" text:class-names=""><text:s text:c="1"/></text:span><text:span text:style-name="a1607" text:class-names="">разбирането</text:span><text:span text:style-name="a1608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44" presentation:style-name="a1620" draw:name="Заглавие 2" svg:x="3.37in" svg:y="0.41983in" svg:width="10.50227in" svg:height="1.14746in" presentation:class="title" presentation:placeholder="false">
          <draw:text-box>
            <text:p text:style-name="a1619" text:class-names="" text:cond-style-name=""><text:span text:style-name="a1611" text:class-names="">7.Структура</text:span><text:span text:style-name="a1612" text:class-names=""><text:s text:c="1"/>и<text:s text:c="1"/></text:span><text:span text:style-name="a1613" text:class-names="">ход</text:span><text:span text:style-name="a1614" text:class-names=""><text:s text:c="1"/></text:span><text:span text:style-name="a1615" text:class-names="">на</text:span><text:span text:style-name="a1616" text:class-names=""><text:s text:c="1"/></text:span><text:span text:style-name="a1617" text:class-names="">урокa</text:span><text:span text:style-name="a1618" text:class-names=""/></text:p>
          </draw:text-box>
          <svg:title/>
          <svg:desc/>
        </draw:frame>
      </draw:page>
      <draw:page draw:name="Slide28" draw:style-name="a1622" draw:master-page-name="Master1-Layout2-cust-Заглавие-и-съдържание" presentation:presentation-page-layout-name="Master1-PPL2" draw:id="Slide-283">
        <draw:frame draw:id="id145" presentation:style-name="a1674" draw:name="Контейнер за съдържание 1" svg:x="0.94678in" svg:y="2.23041in" svg:width="4.8501in" svg:height="3.77364in" presentation:class="outline" presentation:placeholder="false">
          <draw:text-box>
            <text:list text:style-name="a1673">
              <text:list-item>
                <text:p text:style-name="a1672" text:class-names="" text:cond-style-name=""><text:span text:style-name="a1623" text:class-names="">В<text:s text:c="1"/></text:span><text:span text:style-name="a1624" text:class-names="">урока</text:span><text:span text:style-name="a1625" text:class-names=""><text:s text:c="1"/></text:span><text:span text:style-name="a1626" text:class-names="">се</text:span><text:span text:style-name="a1627" text:class-names=""><text:s text:c="1"/>използват<text:s text:c="1"/></text:span><text:span text:style-name="a1628" text:class-names="">устно</text:span><text:span text:style-name="a1629" text:class-names=""><text:s text:c="1"/></text:span><text:span text:style-name="a1630" text:class-names="">изложение</text:span><text:span text:style-name="a1631" text:class-names="">,<text:s text:c="1"/></text:span><text:span text:style-name="a1632" text:class-names="">беседа</text:span><text:span text:style-name="a1633" text:class-names="">,<text:s text:c="1"/></text:span><text:span text:style-name="a1634" text:class-names="">дискусия</text:span><text:span text:style-name="a1635" text:class-names="">,<text:s text:c="1"/></text:span><text:span text:style-name="a1636" text:class-names="">задаване</text:span><text:span text:style-name="a1637" text:class-names=""><text:s text:c="1"/></text:span><text:span text:style-name="a1638" text:class-names="">на</text:span><text:span text:style-name="a1639" text:class-names=""><text:s text:c="1"/>въпроси и<text:s text:c="1"/></text:span><text:span text:style-name="a1640" text:class-names="">работа</text:span><text:span text:style-name="a1641" text:class-names=""><text:s text:c="1"/>с<text:s text:c="1"/></text:span><text:span text:style-name="a1642" text:class-names="">практически</text:span><text:span text:style-name="a1643" text:class-names=""><text:s text:c="1"/></text:span><text:span text:style-name="a1644" text:class-names="">задачи</text:span><text:span text:style-name="a1645" text:class-names="">. Тези<text:s text:c="1"/></text:span><text:span text:style-name="a1646" text:class-names="">методи</text:span><text:span text:style-name="a1647" text:class-names=""><text:s text:c="1"/></text:span><text:span text:style-name="a1648" text:class-names="">са</text:span><text:span text:style-name="a1649" text:class-names=""><text:s text:c="1"/>подходящи,<text:s text:c="1"/></text:span><text:span text:style-name="a1650" text:class-names="">защото</text:span><text:span text:style-name="a1651" text:class-names=""><text:s text:c="1"/></text:span><text:span text:style-name="a1652" text:class-names="">подпомагат</text:span><text:span text:style-name="a1653" text:class-names=""><text:s text:c="1"/></text:span><text:span text:style-name="a1654" text:class-names="">активното</text:span><text:span text:style-name="a1655" text:class-names=""><text:s text:c="1"/></text:span><text:span text:style-name="a1656" text:class-names="">участие</text:span><text:span text:style-name="a1657" text:class-names=""><text:s text:c="1"/></text:span><text:span text:style-name="a1658" text:class-names="">на</text:span><text:span text:style-name="a1659" text:class-names=""><text:s text:c="1"/></text:span><text:span text:style-name="a1660" text:class-names="">курсистите</text:span><text:span text:style-name="a1661" text:class-names=""><text:s text:c="1"/>и свързват<text:s text:c="1"/></text:span><text:span text:style-name="a1662" text:class-names="">учебното</text:span><text:span text:style-name="a1663" text:class-names=""><text:s text:c="1"/>съдържание с<text:s text:c="1"/></text:span><text:span text:style-name="a1664" text:class-names="">реалното</text:span><text:span text:style-name="a1665" text:class-names=""><text:s text:c="1"/></text:span><text:span text:style-name="a1666" text:class-names="">поведение</text:span><text:span text:style-name="a1667" text:class-names=""><text:s text:c="1"/></text:span><text:span text:style-name="a1668" text:class-names="">на</text:span><text:span text:style-name="a1669" text:class-names=""><text:s text:c="1"/></text:span><text:span text:style-name="a1670" text:class-names="">пътя</text:span><text:span text:style-name="a1671" text:class-names="">.</text:span></text:p>
              </text:list-item>
            </text:list>
          </draw:text-box>
          <svg:title/>
          <svg:desc/>
        </draw:frame>
        <draw:frame draw:id="id146" presentation:style-name="a1675" draw:name="Заглавие 2" svg:x="1.41553in" svg:y="0.87983in" svg:width="10.50227in" svg:height="1.14746in" presentation:class="title" presentation:placeholder="true">
          <draw:text-box/>
          <svg:title/>
          <svg:desc/>
        </draw:frame>
        <draw:frame draw:id="id147" draw:style-name="a1736" draw:name="Текстово поле 3" svg:x="6.25in" svg:y="2.39063in" svg:width="6.71875in" svg:height="3.13027in">
          <draw:text-box>
            <text:p text:style-name="a1680" text:class-names="" text:cond-style-name=""><text:span text:style-name="a1676" text:class-names="">Дидактически</text:span><text:span text:style-name="a1677" text:class-names=""><text:s text:c="1"/></text:span><text:span text:style-name="a1678" text:class-names="">средства</text:span><text:span text:style-name="a1679" text:class-names=""><text:s text:c="1"/></text:span></text:p>
            <text:p text:style-name="a1682" text:class-names="" text:cond-style-name=""><text:span text:style-name="a1681" text:class-names=""/></text:p>
            <text:p text:style-name="a1721" text:class-names="" text:cond-style-name=""><text:span text:style-name="a1683" text:class-names="">За<text:s text:c="1"/></text:span><text:span text:style-name="a1684" text:class-names="">провеждане</text:span><text:span text:style-name="a1685" text:class-names=""><text:s text:c="1"/></text:span><text:span text:style-name="a1686" text:class-names="">на</text:span><text:span text:style-name="a1687" text:class-names=""><text:s text:c="1"/></text:span><text:span text:style-name="a1688" text:class-names="">урока</text:span><text:span text:style-name="a1689" text:class-names=""><text:s text:c="1"/>могат<text:s text:c="1"/></text:span><text:span text:style-name="a1690" text:class-names="">да</text:span><text:span text:style-name="a1691" text:class-names=""><text:s text:c="1"/></text:span><text:span text:style-name="a1692" text:class-names="">се</text:span><text:span text:style-name="a1693" text:class-names=""><text:s text:c="1"/>използват<text:s text:c="1"/></text:span><text:span text:style-name="a1694" text:class-names="">презентация</text:span><text:span text:style-name="a1695" text:class-names="">,<text:s text:c="1"/></text:span><text:span text:style-name="a1696" text:class-names="">дъска</text:span><text:span text:style-name="a1697" text:class-names="">, учебни<text:s text:c="1"/></text:span><text:span text:style-name="a1698" text:class-names="">материали</text:span><text:span text:style-name="a1699" text:class-names="">,<text:s text:c="1"/></text:span><text:span text:style-name="a1700" text:class-names="">Закон</text:span><text:span text:style-name="a1701" text:class-names=""><text:s text:c="1"/>за<text:s text:c="1"/></text:span><text:span text:style-name="a1702" text:class-names="">движението</text:span><text:span text:style-name="a1703" text:class-names=""><text:s text:c="1"/></text:span><text:span text:style-name="a1704" text:class-names="">по</text:span><text:span text:style-name="a1705" text:class-names=""><text:s text:c="1"/></text:span><text:span text:style-name="a1706" text:class-names="">пътищата</text:span><text:span text:style-name="a1707" text:class-names="">,<text:s text:c="1"/></text:span><text:span text:style-name="a1708" text:class-names="">примерни</text:span><text:span text:style-name="a1709" text:class-names=""><text:s text:c="1"/></text:span><text:span text:style-name="a1710" text:class-names="">казуси</text:span><text:span text:style-name="a1711" text:class-names=""><text:s text:c="1"/>и<text:s text:c="1"/></text:span><text:span text:style-name="a1712" text:class-names="">изображения</text:span><text:span text:style-name="a1713" text:class-names=""><text:s text:c="1"/></text:span><text:span text:style-name="a1714" text:class-names="">на</text:span><text:span text:style-name="a1715" text:class-names=""><text:s text:c="1"/></text:span><text:span text:style-name="a1716" text:class-names="">пътни</text:span><text:span text:style-name="a1717" text:class-names=""><text:s text:c="1"/></text:span><text:span text:style-name="a1718" text:class-names="">ситуации</text:span><text:span text:style-name="a1719" text:class-names="">.<text:s text:c="1"/></text:span><text:span text:style-name="a1720" text:class-names=""/></text:p>
            <text:p text:style-name="a1723" text:class-names="" text:cond-style-name=""><text:span text:style-name="a1722" text:class-names=""/></text:p>
            <text:p text:style-name="a1735" text:class-names="" text:cond-style-name=""><text:span text:style-name="a1724" text:class-names="">Чрез тях съдържанието<text:s text:c="1"/></text:span><text:span text:style-name="a1725" text:class-names="">се</text:span><text:span text:style-name="a1726" text:class-names=""><text:s text:c="1"/></text:span><text:span text:style-name="a1727" text:class-names="">представя</text:span><text:span text:style-name="a1728" text:class-names=""><text:s text:c="1"/></text:span><text:span text:style-name="a1729" text:class-names="">по-нагледно</text:span><text:span text:style-name="a1730" text:class-names=""><text:s text:c="1"/>и<text:s text:c="1"/></text:span><text:span text:style-name="a1731" text:class-names="">по</text:span><text:span text:style-name="a1732" text:class-names="">-лесно<text:s text:c="1"/></text:span><text:span text:style-name="a1733" text:class-names="">разбираемо</text:span><text:span text:style-name="a1734" text:class-names="">.</text:span></text:p>
          </draw:text-box>
          <svg:title/>
          <svg:desc/>
        </draw:frame>
      </draw:page>
      <draw:page draw:name="Slide29" draw:style-name="a1738" draw:master-page-name="Master1-Layout4-cust-Две-съдържания" presentation:presentation-page-layout-name="Master1-PPL4" draw:id="Slide-284">
        <draw:frame draw:id="id148" presentation:style-name="a1761" draw:name="Контейнер за съдържание 1" svg:x="1.40876in" svg:y="3.08298in" svg:width="5.08in" svg:height="3.77143in" presentation:class="outline" presentation:placeholder="false">
          <draw:text-box>
            <text:list text:style-name="a1760">
              <text:list-item>
                <text:p text:style-name="a1759" text:class-names="" text:cond-style-name=""><text:span text:style-name="a1739" text:class-names="">Оценяването</text:span><text:span text:style-name="a1740" text:class-names=""><text:s text:c="1"/></text:span><text:span text:style-name="a1741" text:class-names="">се</text:span><text:span text:style-name="a1742" text:class-names=""><text:s text:c="1"/></text:span><text:span text:style-name="a1743" text:class-names="">извършва</text:span><text:span text:style-name="a1744" text:class-names=""><text:s text:c="1"/>чрез<text:s text:c="1"/></text:span><text:span text:style-name="a1745" text:class-names="">устни</text:span><text:span text:style-name="a1746" text:class-names=""><text:s text:c="1"/>въпроси,<text:s text:c="1"/></text:span><text:span text:style-name="a1747" text:class-names="">участие</text:span><text:span text:style-name="a1748" text:class-names=""><text:s text:c="1"/>в<text:s text:c="1"/></text:span><text:span text:style-name="a1749" text:class-names="">дискусията</text:span><text:span text:style-name="a1750" text:class-names=""><text:s text:c="1"/>и<text:s text:c="1"/></text:span><text:span text:style-name="a1751" text:class-names="">решаване</text:span><text:span text:style-name="a1752" text:class-names=""><text:s text:c="1"/></text:span><text:span text:style-name="a1753" text:class-names="">на</text:span><text:span text:style-name="a1754" text:class-names=""><text:s text:c="1"/></text:span><text:span text:style-name="a1755" text:class-names="">практически</text:span><text:span text:style-name="a1756" text:class-names=""><text:s text:c="1"/></text:span><text:span text:style-name="a1757" text:class-names="">казуси</text:span><text:span text:style-name="a1758" text:class-names="">.<text:s text:c="1"/></text:span></text:p>
              </text:list-item>
            </text:list>
          </draw:text-box>
          <svg:title/>
          <svg:desc/>
        </draw:frame>
        <draw:frame draw:id="id149" presentation:style-name="a1797" draw:name="Контейнер за съдържание 2" svg:x="6.8378in" svg:y="3.08298in" svg:width="5.08in" svg:height="3.76369in" presentation:class="outline" presentation:placeholder="false">
          <draw:text-box>
            <text:list text:style-name="a1796">
              <text:list-item>
                <text:p text:style-name="a1795" text:class-names="" text:cond-style-name=""><text:span text:style-name="a1762" text:class-names="">Проследява<text:s text:c="1"/></text:span><text:span text:style-name="a1763" text:class-names="">се</text:span><text:span text:style-name="a1764" text:class-names=""><text:s text:c="1"/>дали<text:s text:c="1"/></text:span><text:span text:style-name="a1765" text:class-names="">курсистите</text:span><text:span text:style-name="a1766" text:class-names=""><text:s text:c="1"/>могат<text:s text:c="1"/></text:span><text:span text:style-name="a1767" text:class-names="">да</text:span><text:span text:style-name="a1768" text:class-names=""><text:s text:c="1"/></text:span><text:span text:style-name="a1769" text:class-names="">разпознават</text:span><text:span text:style-name="a1770" text:class-names=""><text:s text:c="1"/></text:span><text:span text:style-name="a1771" text:class-names="">задълженията</text:span><text:span text:style-name="a1772" text:class-names=""><text:s text:c="1"/></text:span><text:span text:style-name="a1773" text:class-names="">на</text:span><text:span text:style-name="a1774" text:class-names=""><text:s text:c="1"/></text:span><text:span text:style-name="a1775" text:class-names="">водача</text:span><text:span text:style-name="a1776" text:class-names="">,<text:s text:c="1"/></text:span><text:span text:style-name="a1777" text:class-names="">рисковите</text:span><text:span text:style-name="a1778" text:class-names=""><text:s text:c="1"/></text:span><text:span text:style-name="a1779" text:class-names="">ситуации</text:span><text:span text:style-name="a1780" text:class-names=""><text:s text:c="1"/>и<text:s text:c="1"/></text:span><text:span text:style-name="a1781" text:class-names="">правилното</text:span><text:span text:style-name="a1782" text:class-names=""><text:s text:c="1"/></text:span><text:span text:style-name="a1783" text:class-names="">поведение</text:span><text:span text:style-name="a1784" text:class-names=""><text:s text:c="1"/></text:span><text:span text:style-name="a1785" text:class-names="">при</text:span><text:span text:style-name="a1786" text:class-names=""><text:s text:c="1"/></text:span><text:span text:style-name="a1787" text:class-names="">различни</text:span><text:span text:style-name="a1788" text:class-names=""><text:s text:c="1"/></text:span><text:span text:style-name="a1789" text:class-names="">условия</text:span><text:span text:style-name="a1790" text:class-names=""><text:s text:c="1"/></text:span><text:span text:style-name="a1791" text:class-names="">на</text:span><text:span text:style-name="a1792" text:class-names=""><text:s text:c="1"/></text:span><text:span text:style-name="a1793" text:class-names="">движение</text:span><text:span text:style-name="a1794" text:class-names="">.</text:span></text:p>
              </text:list-item>
            </text:list>
          </draw:text-box>
          <svg:title/>
          <svg:desc/>
        </draw:frame>
        <draw:frame draw:id="id150" presentation:style-name="a1800" draw:name="Заглавие 3" svg:x="1.41553in" svg:y="0.87983in" svg:width="10.50227in" svg:height="1.14746in" presentation:class="title" presentation:placeholder="false">
          <draw:text-box>
            <text:p text:style-name="a1799" text:class-names="" text:cond-style-name=""><text:span text:style-name="a1798" text:class-names="">Контрол и оценяване</text:span></text:p>
          </draw:text-box>
          <svg:title/>
          <svg:desc/>
        </draw:frame>
      </draw:page>
      <draw:page draw:name="Slide22" draw:style-name="a1802" draw:master-page-name="Master1-Layout2-cust-Заглавие-и-съдържание" presentation:presentation-page-layout-name="Master1-PPL2" draw:id="Slide-277">
        <draw:frame draw:id="id151" presentation:style-name="a1862" draw:name="Контейнер за съдържание 1" svg:x="1.41553in" svg:y="2.20443in" svg:width="10.50227in" svg:height="3.77364in" presentation:class="outline" presentation:placeholder="false">
          <draw:text-box>
            <text:list text:style-name="a1805">
              <text:list-item>
                <text:p text:style-name="a1804" text:class-names="" text:cond-style-name=""><text:span text:style-name="a1803" text:class-names=""/></text:p>
              </text:list-item>
            </text:list>
            <text:list text:style-name="a1809">
              <text:list-item>
                <text:p text:style-name="a1808" text:class-names="" text:cond-style-name=""><text:span text:style-name="a1806" text:class-names="">За оценяване на усвоените знания преподавателят може да използва устни въпроси:</text:span><text:span text:style-name="a1807" text:class-names=""/></text:p>
              </text:list-item>
            </text:list>
            <text:list text:style-name="a1813">
              <text:list-item>
                <text:p text:style-name="a1812" text:class-names="" text:cond-style-name=""><text:span text:style-name="a1810" text:class-names="">Защо водачът трябва да съобразява скоростта с пътните условия?</text:span><text:span text:style-name="a1811" text:class-names=""/></text:p>
              </text:list-item>
            </text:list>
            <text:list text:style-name="a1817">
              <text:list-item>
                <text:p text:style-name="a1816" text:class-names="" text:cond-style-name=""><text:span text:style-name="a1814" text:class-names="">Как трябва да реагира водачът при агресивно поведение от друг участник в движението?</text:span><text:span text:style-name="a1815" text:class-names=""/></text:p>
              </text:list-item>
            </text:list>
            <text:list text:style-name="a1858">
              <text:list-item>
                <text:p text:style-name="a1857" text:class-names="" text:cond-style-name=""><text:span text:style-name="a1818" text:class-names="">Оценява</text:span><text:span text:style-name="a1819" text:class-names=""><text:s text:c="1"/></text:span><text:span text:style-name="a1820" text:class-names="">се</text:span><text:span text:style-name="a1821" text:class-names=""><text:s text:c="1"/>дали<text:s text:c="1"/></text:span><text:span text:style-name="a1822" text:class-names="">курсистите</text:span><text:span text:style-name="a1823" text:class-names=""><text:s text:c="1"/>могат<text:s text:c="1"/></text:span><text:span text:style-name="a1824" text:class-names="">да</text:span><text:span text:style-name="a1825" text:class-names=""><text:s text:c="1"/></text:span><text:span text:style-name="a1826" text:class-names="">разпознават</text:span><text:span text:style-name="a1827" text:class-names=""><text:s text:c="1"/></text:span><text:span text:style-name="a1828" text:class-names="">задълженията</text:span><text:span text:style-name="a1829" text:class-names=""><text:s text:c="1"/></text:span><text:span text:style-name="a1830" text:class-names="">на</text:span><text:span text:style-name="a1831" text:class-names=""><text:s text:c="1"/></text:span><text:span text:style-name="a1832" text:class-names="">водача</text:span><text:span text:style-name="a1833" text:class-names="">,<text:s text:c="1"/></text:span><text:span text:style-name="a1834" text:class-names="">да</text:span><text:span text:style-name="a1835" text:class-names=""><text:s text:c="1"/></text:span><text:span text:style-name="a1836" text:class-names="">определят</text:span><text:span text:style-name="a1837" text:class-names=""><text:s text:c="1"/></text:span><text:span text:style-name="a1838" text:class-names="">правилно</text:span><text:span text:style-name="a1839" text:class-names=""><text:s text:c="1"/></text:span><text:span text:style-name="a1840" text:class-names="">поведение</text:span><text:span text:style-name="a1841" text:class-names=""><text:s text:c="1"/>в<text:s text:c="1"/></text:span><text:span text:style-name="a1842" text:class-names="">конкретна</text:span><text:span text:style-name="a1843" text:class-names=""><text:s text:c="1"/></text:span><text:span text:style-name="a1844" text:class-names="">ситуация</text:span><text:span text:style-name="a1845" text:class-names=""><text:s text:c="1"/>и<text:s text:c="1"/></text:span><text:span text:style-name="a1846" text:class-names="">да</text:span><text:span text:style-name="a1847" text:class-names=""><text:s text:c="1"/></text:span><text:span text:style-name="a1848" text:class-names="">обясняват</text:span><text:span text:style-name="a1849" text:class-names=""><text:s text:c="1"/></text:span><text:span text:style-name="a1850" text:class-names="">причините</text:span><text:span text:style-name="a1851" text:class-names=""><text:s text:c="1"/>за<text:s text:c="1"/></text:span><text:span text:style-name="a1852" text:class-names="">избора</text:span><text:span text:style-name="a1853" text:class-names=""><text:s text:c="1"/></text:span><text:span text:style-name="a1854" text:class-names="">си</text:span><text:span text:style-name="a1855" text:class-names="">.</text:span><text:span text:style-name="a1856" text:class-names=""/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/></text:p>
              </text:list-item>
            </text:list>
          </draw:text-box>
          <svg:title/>
          <svg:desc/>
        </draw:frame>
        <draw:frame draw:id="id152" presentation:style-name="a1866" draw:name="Заглавие 2" svg:x="1.41553in" svg:y="0.87983in" svg:width="10.50227in" svg:height="1.14746in" presentation:class="title" presentation:placeholder="false">
          <draw:text-box>
            <text:p text:style-name="a1865" text:class-names="" text:cond-style-name=""><text:span text:style-name="a1863" text:class-names=""><text:s text:c="1"/>Контрол и оценяване — 3 минути</text:span><text:span text:style-name="a1864" text:class-names=""><text:line-break/></text:span></text:p>
          </draw:text-box>
          <svg:title/>
          <svg:desc/>
        </draw:frame>
      </draw:page>
      <draw:page draw:name="Slide26" draw:style-name="a1868" draw:master-page-name="Master1-Layout2-cust-Заглавие-и-съдържание" presentation:presentation-page-layout-name="Master1-PPL2" draw:id="Slide-281">
        <draw:frame draw:id="id153" presentation:style-name="a1960" draw:name="Контейнер за съдържание 1" svg:x="1.41553in" svg:y="2.20443in" svg:width="10.50227in" svg:height="3.77364in" presentation:class="outline" presentation:placeholder="false">
          <draw:text-box>
            <text:list text:style-name="a1891">
              <text:list-item>
                <text:p text:style-name="a1890" text:class-names="" text:cond-style-name=""><text:span text:style-name="a1869" text:class-names="">В<text:s text:c="1"/></text:span><text:span text:style-name="a1870" text:class-names="">урока</text:span><text:span text:style-name="a1871" text:class-names=""><text:s text:c="1"/></text:span><text:span text:style-name="a1872" text:class-names="">се</text:span><text:span text:style-name="a1873" text:class-names=""><text:s text:c="1"/></text:span><text:span text:style-name="a1874" text:class-names="">предвиждат</text:span><text:span text:style-name="a1875" text:class-names=""><text:s text:c="1"/></text:span><text:span text:style-name="a1876" text:class-names="">практически</text:span><text:span text:style-name="a1877" text:class-names=""><text:s text:c="1"/></text:span><text:span text:style-name="a1878" text:class-names="">задачи</text:span><text:span text:style-name="a1879" text:class-names="">, чрез които<text:s text:c="1"/></text:span><text:span text:style-name="a1880" text:class-names="">курсистите</text:span><text:span text:style-name="a1881" text:class-names=""><text:s text:c="1"/></text:span><text:span text:style-name="a1882" text:class-names="">да</text:span><text:span text:style-name="a1883" text:class-names=""><text:s text:c="1"/></text:span><text:span text:style-name="a1884" text:class-names="">приложат</text:span><text:span text:style-name="a1885" text:class-names=""><text:s text:c="1"/></text:span><text:span text:style-name="a1886" text:class-names="">знанията</text:span><text:span text:style-name="a1887" text:class-names=""><text:s text:c="1"/></text:span><text:span text:style-name="a1888" text:class-names="">си</text:span><text:span text:style-name="a1889" text:class-names="">:</text:span></text:p>
              </text:list-item>
            </text:list>
            <text:list text:style-name="a1905">
              <text:list-item>
                <text:p text:style-name="a1904" text:class-names="" text:cond-style-name=""><text:span text:style-name="a1892" text:class-names="">Посочване</text:span><text:span text:style-name="a1893" text:class-names=""><text:s text:c="1"/></text:span><text:span text:style-name="a1894" text:class-names="">на</text:span><text:span text:style-name="a1895" text:class-names=""><text:s text:c="1"/></text:span><text:span text:style-name="a1896" text:class-names="">действията</text:span><text:span text:style-name="a1897" text:class-names=""><text:s text:c="1"/></text:span><text:span text:style-name="a1898" text:class-names="">на</text:span><text:span text:style-name="a1899" text:class-names=""><text:s text:c="1"/></text:span><text:span text:style-name="a1900" text:class-names="">водача</text:span><text:span text:style-name="a1901" text:class-names=""><text:s text:c="1"/>преди<text:s text:c="1"/></text:span><text:span text:style-name="a1902" text:class-names="">потегляне</text:span><text:span text:style-name="a1903" text:class-names="">.<text:s text:c="1"/></text:span></text:p>
              </text:list-item>
            </text:list>
            <text:list text:style-name="a1923">
              <text:list-item>
                <text:p text:style-name="a1922" text:class-names="" text:cond-style-name=""><text:span text:style-name="a1906" text:class-names="">Разпознаване</text:span><text:span text:style-name="a1907" text:class-names=""><text:s text:c="1"/></text:span><text:span text:style-name="a1908" text:class-names="">на</text:span><text:span text:style-name="a1909" text:class-names=""><text:s text:c="1"/></text:span><text:span text:style-name="a1910" text:class-names="">рискова</text:span><text:span text:style-name="a1911" text:class-names=""><text:s text:c="1"/></text:span><text:span text:style-name="a1912" text:class-names="">ситуация</text:span><text:span text:style-name="a1913" text:class-names=""><text:s text:c="1"/></text:span><text:span text:style-name="a1914" text:class-names="">при</text:span><text:span text:style-name="a1915" text:class-names=""><text:s text:c="1"/></text:span><text:span text:style-name="a1916" text:class-names="">дъжд</text:span><text:span text:style-name="a1917" text:class-names=""><text:s text:c="1"/>и<text:s text:c="1"/></text:span><text:span text:style-name="a1918" text:class-names="">пешеходна</text:span><text:span text:style-name="a1919" text:class-names=""><text:s text:c="1"/></text:span><text:span text:style-name="a1920" text:class-names="">пътека</text:span><text:span text:style-name="a1921" text:class-names="">.<text:s text:c="1"/></text:span></text:p>
              </text:list-item>
            </text:list>
            <text:list text:style-name="a1939">
              <text:list-item>
                <text:p text:style-name="a1938" text:class-names="" text:cond-style-name=""><text:span text:style-name="a1924" text:class-names="">Определяне</text:span><text:span text:style-name="a1925" text:class-names=""><text:s text:c="1"/></text:span><text:span text:style-name="a1926" text:class-names="">на</text:span><text:span text:style-name="a1927" text:class-names=""><text:s text:c="1"/></text:span><text:span text:style-name="a1928" text:class-names="">правилното</text:span><text:span text:style-name="a1929" text:class-names=""><text:s text:c="1"/></text:span><text:span text:style-name="a1930" text:class-names="">поведение</text:span><text:span text:style-name="a1931" text:class-names=""><text:s text:c="1"/></text:span><text:span text:style-name="a1932" text:class-names="">при</text:span><text:span text:style-name="a1933" text:class-names=""><text:s text:c="1"/></text:span><text:span text:style-name="a1934" text:class-names="">пътнотранспортно</text:span><text:span text:style-name="a1935" text:class-names=""><text:s text:c="1"/></text:span><text:span text:style-name="a1936" text:class-names="">произшествие</text:span><text:span text:style-name="a1937" text:class-names="">.<text:s text:c="1"/></text:span></text:p>
              </text:list-item>
            </text:list>
            <text:list text:style-name="a1956">
              <text:list-item>
                <text:p text:style-name="a1955" text:class-names="" text:cond-style-name=""><text:span text:style-name="a1940" text:class-names="">Тези<text:s text:c="1"/></text:span><text:span text:style-name="a1941" text:class-names="">задачи</text:span><text:span text:style-name="a1942" text:class-names=""><text:s text:c="1"/></text:span><text:span text:style-name="a1943" text:class-names="">проверяват</text:span><text:span text:style-name="a1944" text:class-names=""><text:s text:c="1"/>дали<text:s text:c="1"/></text:span><text:span text:style-name="a1945" text:class-names="">курсистите</text:span><text:span text:style-name="a1946" text:class-names=""><text:s text:c="1"/>могат<text:s text:c="1"/></text:span><text:span text:style-name="a1947" text:class-names="">да</text:span><text:span text:style-name="a1948" text:class-names=""><text:s text:c="1"/>свържат<text:s text:c="1"/></text:span><text:span text:style-name="a1949" text:class-names="">теорията</text:span><text:span text:style-name="a1950" text:class-names=""><text:s text:c="1"/>с<text:s text:c="1"/></text:span><text:span text:style-name="a1951" text:class-names="">реалното</text:span><text:span text:style-name="a1952" text:class-names=""><text:s text:c="1"/></text:span><text:span text:style-name="a1953" text:class-names="">движение</text:span><text:span text:style-name="a1954" text:class-names="">.</text:span></text:p>
              </text:list-item>
            </text:list>
            <text:list text:style-name="a1959">
              <text:list-item>
                <text:p text:style-name="a1958" text:class-names="" text:cond-style-name=""><text:span text:style-name="a1957" text:class-names=""/></text:p>
              </text:list-item>
            </text:list>
          </draw:text-box>
          <svg:title/>
          <svg:desc/>
        </draw:frame>
        <draw:frame draw:id="id154" presentation:style-name="a1963" draw:name="Заглавие 2" svg:x="1.41553in" svg:y="0.87983in" svg:width="10.50227in" svg:height="1.14746in" presentation:class="title" presentation:placeholder="false">
          <draw:text-box>
            <text:p text:style-name="a1962" text:class-names="" text:cond-style-name=""><text:span text:style-name="a1961" text:class-names="">Практически задачи към урока</text:span></text:p>
          </draw:text-box>
          <svg:title/>
          <svg:desc/>
        </draw:frame>
      </draw:page>
      <draw:page draw:name="Slide23" draw:style-name="a1965" draw:master-page-name="Master1-Layout2-cust-Заглавие-и-съдържание" presentation:presentation-page-layout-name="Master1-PPL2" draw:id="Slide-278">
        <draw:frame draw:id="id155" presentation:style-name="a1993" draw:name="Контейнер за съдържание 1" svg:x="1.41553in" svg:y="1.94443in" svg:width="10.50227in" svg:height="3.77364in" presentation:class="outline" presentation:placeholder="false">
          <draw:text-box>
            <text:list text:style-name="a1968">
              <text:list-item>
                <text:p text:style-name="a1967" text:class-names="" text:cond-style-name=""><text:span text:style-name="a1966" text:class-names=""/></text:p>
              </text:list-item>
            </text:list>
            <text:list text:style-name="a1973">
              <text:list-item>
                <text:p text:style-name="a1972" text:class-names="" text:cond-style-name=""><text:span text:style-name="a1969" text:class-names="">Може да се използват въпроси, за да се направи урока по-жив</text:span><text:span text:style-name="a1970" text:class-names="">:</text:span><text:span text:style-name="a1971" text:class-names=""/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/></text:p>
              </text:list-item>
            </text:list>
            <text:list text:style-name="a1981">
              <text:list-item>
                <text:p text:style-name="a1980" text:class-names="" text:cond-style-name=""><text:span text:style-name="a1977" text:class-names="">Може ли водачът да спазва закона, но пак да създава опасност</text:span><text:span text:style-name="a1978" text:class-names="">?</text:span><text:span text:style-name="a1979" text:class-names=""/></text:p>
              </text:list-item>
            </text:list>
            <text:list text:style-name="a1984">
              <text:list-item>
                <text:p text:style-name="a1983" text:class-names="" text:cond-style-name=""><text:span text:style-name="a1982" text:class-names=""/></text:p>
              </text:list-item>
            </text:list>
            <text:list text:style-name="a1989">
              <text:list-item>
                <text:p text:style-name="a1988" text:class-names="" text:cond-style-name=""><text:span text:style-name="a1985" text:class-names="">Кои участници в движението трябва да пазим най-много и защо</text:span><text:span text:style-name="a1986" text:class-names="">?</text:span><text:span text:style-name="a1987" text:class-names=""/></text:p>
              </text:list-item>
            </text:list>
            <text:list text:style-name="a1992">
              <text:list-item>
                <text:p text:style-name="a1991" text:class-names="" text:cond-style-name=""><text:span text:style-name="a1990" text:class-names=""/></text:p>
              </text:list-item>
            </text:list>
          </draw:text-box>
          <svg:title/>
          <svg:desc/>
        </draw:frame>
        <draw:frame draw:id="id156" presentation:style-name="a1998" draw:name="Заглавие 2" svg:x="1.41553in" svg:y="0.87983in" svg:width="10.50227in" svg:height="1.14746in" presentation:class="title" presentation:placeholder="false">
          <draw:text-box>
            <text:p text:style-name="a1997" text:class-names="" text:cond-style-name=""><text:span text:style-name="a1994" text:class-names="">8.</text:span><text:span text:style-name="a1995" text:class-names=""><text:s text:c="1"/>Въпроси към курсистите по време на урока</text:span><text:span text:style-name="a1996" text:class-names=""><text:line-break/></text:span></text:p>
          </draw:text-box>
          <svg:title/>
          <svg:desc/>
        </draw:frame>
      </draw:page>
      <draw:page draw:name="Slide24" draw:style-name="a2000" draw:master-page-name="Master1-Layout2-cust-Заглавие-и-съдържание" presentation:presentation-page-layout-name="Master1-PPL2" draw:id="Slide-279">
        <draw:frame draw:id="id157" presentation:style-name="a2033" draw:name="Контейнер за съдържание 1" svg:x="1.41553in" svg:y="2.20443in" svg:width="10.50227in" svg:height="3.77364in" presentation:class="outline" presentation:placeholder="false">
          <draw:text-box>
            <text:list text:style-name="a2004">
              <text:list-item>
                <text:p text:style-name="a2003" text:class-names="" text:cond-style-name=""><text:span text:style-name="a2001" text:class-names="">В края на урока трябва ясно да се подчертае, че водачът има много повече от техническата задача да управлява автомобил. Той има морална, правна и обществена отговорност.</text:span><text:span text:style-name="a2002" text:class-names=""/></text:p>
              </text:list-item>
            </text:list>
            <text:list text:style-name="a2032">
              <text:list-item>
                <text:p text:style-name="a2031" text:class-names="" text:cond-style-name=""><text:span text:style-name="a2005" text:class-names="">Урокът</text:span><text:span text:style-name="a2006" text:class-names=""><text:s text:c="1"/>е<text:s text:c="1"/></text:span><text:span text:style-name="a2007" text:class-names="">структуриран</text:span><text:span text:style-name="a2008" text:class-names=""><text:s text:c="1"/></text:span><text:span text:style-name="a2009" text:class-names="">така</text:span><text:span text:style-name="a2010" text:class-names="">, че<text:s text:c="1"/></text:span><text:span text:style-name="a2011" text:class-names="">да</text:span><text:span text:style-name="a2012" text:class-names=""><text:s text:c="1"/></text:span><text:span text:style-name="a2013" text:class-names="">съчетава</text:span><text:span text:style-name="a2014" text:class-names=""><text:s text:c="1"/></text:span><text:span text:style-name="a2015" text:class-names="">нормативни</text:span><text:span text:style-name="a2016" text:class-names=""><text:s text:c="1"/></text:span><text:span text:style-name="a2017" text:class-names="">знания</text:span><text:span text:style-name="a2018" text:class-names="">,<text:s text:c="1"/></text:span><text:span text:style-name="a2019" text:class-names="">практически</text:span><text:span text:style-name="a2020" text:class-names=""><text:s text:c="1"/></text:span><text:span text:style-name="a2021" text:class-names="">примери</text:span><text:span text:style-name="a2022" text:class-names=""><text:s text:c="1"/>и<text:s text:c="1"/></text:span><text:span text:style-name="a2023" text:class-names="">проверка</text:span><text:span text:style-name="a2024" text:class-names=""><text:s text:c="1"/></text:span><text:span text:style-name="a2025" text:class-names="">на</text:span><text:span text:style-name="a2026" text:class-names=""><text:s text:c="1"/></text:span><text:span text:style-name="a2027" text:class-names="">разбирането</text:span><text:span text:style-name="a2028" text:class-names=""><text:s text:c="1"/>чрез<text:s text:c="1"/></text:span><text:span text:style-name="a2029" text:class-names="">казуси</text:span><text:span text:style-name="a2030" text:class-names="">.</text:span></text:p>
              </text:list-item>
            </text:list>
          </draw:text-box>
          <svg:title/>
          <svg:desc/>
        </draw:frame>
        <draw:frame draw:id="id158" presentation:style-name="a2037" draw:name="Заглавие 2" svg:x="1.41553in" svg:y="0.87983in" svg:width="10.50227in" svg:height="1.14746in" presentation:class="title" presentation:placeholder="false">
          <draw:text-box>
            <text:p text:style-name="a2036" text:class-names="" text:cond-style-name=""><text:span text:style-name="a2034" text:class-names="">10. Заключение на урока</text:span><text:span text:style-name="a203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Заглавен слайд">
      <presentation:placeholder presentation:object="title" svg:x="1.94386in" svg:y="0.8774in" svg:width="9.44562in" svg:height="2.77934in"/>
      <presentation:placeholder presentation:object="subtitle" svg:x="1.94386in" svg:y="3.86177in" svg:width="9.44562in" svg:height="1.06914in"/>
      <presentation:placeholder presentation:object="date-time" svg:x="7.56105in" svg:y="6.96679in" svg:width="3.82843in" svg:height="0.33815in"/>
      <presentation:placeholder presentation:object="footer" svg:x="1.94386in" svg:y="6.96679in" svg:width="5.43954in" svg:height="0.33815in"/>
    </style:presentation-page-layout>
    <style:presentation-page-layout style:name="Master1-PPL2" style:display-name="Заглавие и съдържание">
      <presentation:placeholder presentation:object="object" svg:x="1.41553in" svg:y="2.20443in" svg:width="10.50227in" svg:height="3.77364in"/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title" svg:x="1.41553in" svg:y="0.87983in" svg:width="10.50227in" svg:height="1.14746in"/>
    </style:presentation-page-layout>
    <style:presentation-page-layout style:name="Master1-PPL3" style:display-name="Заглавка разд.">
      <presentation:placeholder presentation:object="title" svg:x="1.94053in" svg:y="1.92053in" svg:width="9.45227in" svg:height="2.06469in"/>
      <presentation:placeholder presentation:object="outline" svg:x="1.94748in" svg:y="4.16251in" svg:width="9.43837in" svg:height="1.10775in"/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</style:presentation-page-layout>
    <style:presentation-page-layout style:name="Master1-PPL4" style:display-name="Две съдържания">
      <presentation:placeholder presentation:object="object" svg:x="1.41321in" svg:y="2.36423in" svg:width="5.08in" svg:height="3.77143in"/>
      <presentation:placeholder presentation:object="object" svg:x="6.84457in" svg:y="2.3713in" svg:width="5.08in" svg:height="3.76369in"/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title" svg:x="1.41553in" svg:y="0.87983in" svg:width="10.50227in" svg:height="1.14746in"/>
    </style:presentation-page-layout>
    <style:presentation-page-layout style:name="Master1-PPL5" style:display-name="Сравнение">
      <presentation:placeholder presentation:object="outline" svg:x="1.40782in" svg:y="2.13342in" svg:width="5.08in" svg:height="0.87702in"/>
      <presentation:placeholder presentation:object="object" svg:x="1.40782in" svg:y="3.01347in" svg:width="5.08in" svg:height="2.89201in"/>
      <presentation:placeholder presentation:object="outline" svg:x="6.8378in" svg:y="2.13719in" svg:width="5.08in" svg:height="0.87734in"/>
      <presentation:placeholder presentation:object="object" svg:x="6.8378in" svg:y="3.01043in" svg:width="5.08in" svg:height="2.88426in"/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title" svg:x="1.41553in" svg:y="0.87983in" svg:width="10.50227in" svg:height="1.14746in"/>
    </style:presentation-page-layout>
    <style:presentation-page-layout style:name="Master1-PPL6" style:display-name="Само заглавие"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title" svg:x="1.41553in" svg:y="0.87983in" svg:width="10.50227in" svg:height="1.14746in"/>
    </style:presentation-page-layout>
    <style:presentation-page-layout style:name="Master1-PPL7" style:display-name="1_Title Only"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title" svg:x="1.41553in" svg:y="0.87983in" svg:width="10.50227in" svg:height="1.14746in"/>
      <presentation:placeholder presentation:object="outline" svg:x="1.8533in" svg:y="2.03963in" svg:width="9.62674in" svg:height="3.42074in"/>
    </style:presentation-page-layout>
    <style:presentation-page-layout style:name="Master1-PPL8" style:display-name="Празен"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</style:presentation-page-layout>
    <style:presentation-page-layout style:name="Master1-PPL9" style:display-name="Съдържание с надпис">
      <presentation:placeholder presentation:object="object" svg:x="5.57223in" svg:y="1.79956in" svg:width="6.3508in" svg:height="4.20041in"/>
      <presentation:placeholder presentation:object="outline" svg:x="1.41176in" svg:y="1.79956in" svg:width="3.93701in" svg:height="4.19589in"/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title" svg:x="1.41553in" svg:y="0.87983in" svg:width="10.50227in" svg:height="1.14746in"/>
    </style:presentation-page-layout>
    <style:presentation-page-layout style:name="Master1-PPL10" style:display-name="Content and Gallery ">
      <presentation:placeholder presentation:object="object" svg:x="1.42213in" svg:y="3.42134in" svg:width="3.30709in" svg:height="2.08504in"/>
      <presentation:placeholder presentation:object="outline" svg:x="8.61072in" svg:y="5.62662in" svg:width="3.32069in" svg:height="0.88299in"/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object" svg:x="5.03293in" svg:y="3.42134in" svg:width="3.30709in" svg:height="2.08504in"/>
      <presentation:placeholder presentation:object="object" svg:x="8.61072in" svg:y="3.42134in" svg:width="3.30709in" svg:height="2.08504in"/>
      <presentation:placeholder presentation:object="outline" svg:x="5.02613in" svg:y="5.62662in" svg:width="3.32069in" svg:height="0.88299in"/>
      <presentation:placeholder presentation:object="outline" svg:x="1.4289in" svg:y="5.62662in" svg:width="3.32069in" svg:height="0.88299in"/>
      <presentation:placeholder presentation:object="outline" svg:x="1.41175in" svg:y="1.7691in" svg:width="10.5188in" svg:height="1.46181in"/>
      <presentation:placeholder presentation:object="title" svg:x="1.41553in" svg:y="0.87983in" svg:width="10.50227in" svg:height="1.14746in"/>
    </style:presentation-page-layout>
    <style:presentation-page-layout style:name="Master1-PPL11" style:display-name="Картина с надпис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7.91346in" svg:y="6.92539in" svg:width="4.71987in" svg:height="0.35009in"/>
      <presentation:placeholder presentation:object="footer" svg:x="1.58288in" svg:y="6.92539in" svg:width="6.05972in" svg:height="0.35097in"/>
    </style:presentation-page-layout>
    <style:style style:family="table-cell" style:name="a86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2">
      <style:table-cell-properties fo:background-color="#ffffff"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86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5">
      <style:table-cell-properties fo:background-color="#ffffff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866">
      <style:table-cell-properties fo:background-color="#fcece8"/>
    </style:style>
    <style:style style:family="table-cell" style:name="a867">
      <style:table-cell-properties fo:background-color="#fcece8"/>
    </style:style>
    <style:style style:family="table-cell" style:name="a86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9">
      <style:table-cell-properties fo:background-color="#ffffff"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850">
      <style:table-cell-properties/>
    </style:style>
    <style:style style:family="table-cell" style:name="a851">
      <style:table-cell-properties fo:background-color="#cfd5ea"/>
    </style:style>
    <style:style style:family="table-cell" style:name="a852">
      <style:table-cell-properties/>
    </style:style>
    <style:style style:family="graphic" style:name="Graphics"/>
    <style:style style:family="table-cell" style:name="a853">
      <style:table-cell-properties fo:background-color="#cfd5ea"/>
    </style:style>
    <style:style style:family="table-cell" style:name="a85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ffffff"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859">
      <style:table-cell-properties fo:background-color="#e9ebf5"/>
    </style:style>
    <style:style style:family="table-cell" style:name="a880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81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882">
      <style:table-cell-properties fo:background-color="#e7e7e7"/>
    </style:style>
    <style:style style:family="table-cell" style:name="a883">
      <style:table-cell-properties fo:background-color="#e7e7e7"/>
    </style:style>
    <style:style style:family="table-cell" style:name="a884">
      <style:table-cell-properties fo:background-color="#4472c4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5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84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8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2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873">
      <style:table-cell-properties fo:background-color="#4472c4"/>
    </style:style>
    <style:style style:family="table-cell" style:name="a874">
      <style:table-cell-properties fo:background-color="#4472c4" fo:border-top="0.00347in solid #4472c4" fo:border-bottom="0.00347in solid #4472c4"/>
    </style:style>
    <style:style style:family="table-cell" style:name="a875">
      <style:table-cell-properties fo:background-color="#4472c4"/>
    </style:style>
    <style:style style:family="table-cell" style:name="a876">
      <style:table-cell-properties fo:background-color="#4472c4"/>
    </style:style>
    <style:style style:family="table-cell" style:name="a877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8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79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60">
      <style:table-cell-properties fo:background-color="#e9ebf5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91" draw:style="linear" draw:angle="0" draw:start-color="#dfdbd5" draw:end-color="#dfdbd5" draw:start-intensity="0%" draw:end-intensity="100%"/>
    <draw:gradient draw:name="a525" draw:style="linear" draw:angle="0" draw:start-color="#dfdbd5" draw:end-color="#dfdbd5" draw:start-intensity="0%" draw:end-intensity="100%"/>
    <draw:gradient draw:name="a799" draw:style="linear" draw:angle="0" draw:start-color="#000001" draw:end-color="#191919" draw:start-intensity="100%" draw:end-intensity="100%"/>
    <draw:gradient draw:name="a803" draw:style="linear" draw:angle="1800" draw:start-color="#dadada" draw:end-color="#fffffe" draw:start-intensity="100%" draw:end-intensity="100%"/>
    <draw:gradient draw:name="a471" draw:style="linear" draw:angle="0" draw:start-color="#dfdbd5" draw:end-color="#dfdbd5" draw:start-intensity="0%" draw:end-intensity="100%"/>
    <draw:gradient draw:name="a329" draw:style="linear" draw:angle="0" draw:start-color="#dfdbd5" draw:end-color="#dfdbd5" draw:start-intensity="0%" draw:end-intensity="100%"/>
    <draw:gradient draw:name="a773" draw:style="linear" draw:angle="0" draw:start-color="#dfdbd5" draw:end-color="#dfdbd5" draw:start-intensity="0%" draw:end-intensity="100%"/>
    <draw:gradient draw:name="a245" draw:style="linear" draw:angle="0" draw:start-color="#dfdbd5" draw:end-color="#dfdbd5" draw:start-intensity="0%" draw:end-intensity="100%"/>
    <draw:gradient draw:name="a421" draw:style="linear" draw:angle="0" draw:start-color="#dfdbd5" draw:end-color="#dfdbd5" draw:start-intensity="0%" draw:end-intensity="100%"/>
    <draw:gradient draw:name="a4" draw:style="linear" draw:angle="0" draw:start-color="#dfdbd5" draw:end-color="#dfdbd5" draw:start-intensity="0%" draw:end-intensity="100%"/>
    <draw:gradient draw:name="a124" draw:style="linear" draw:angle="0" draw:start-color="#dfdbd5" draw:end-color="#dfdbd5" draw:start-intensity="0%" draw:end-intensity="100%"/>
    <draw:gradient draw:name="a570" draw:style="linear" draw:angle="0" draw:start-color="#dfdbd5" draw:end-color="#dfdbd5" draw:start-intensity="0%" draw:end-intensity="100%"/>
    <draw:gradient draw:name="a641" draw:style="linear" draw:angle="0" draw:start-color="#dfdbd5" draw:end-color="#dfdbd5" draw:start-intensity="0%" draw:end-intensity="100%"/>
    <draw:gradient draw:name="a70" draw:style="linear" draw:angle="0" draw:start-color="#dfdbd5" draw:end-color="#dfdbd5" draw:start-intensity="0%" draw:end-intensity="100%"/>
    <draw:fill-image draw:name="a417" xlink:href="media/image4.jpeg" xlink:show="embed" xlink:actuate="onLoad"/>
    <draw:fill-image draw:name="a1390" xlink:href="media/image4.jpeg" xlink:show="embed" xlink:actuate="onLoad"/>
    <draw:fill-image draw:name="a566" xlink:href="media/image4.jpeg" xlink:show="embed" xlink:actuate="onLoad"/>
    <draw:fill-image draw:name="a637" xlink:href="media/image4.jpeg" xlink:show="embed" xlink:actuate="onLoad"/>
    <draw:fill-image draw:name="a1999" xlink:href="media/image4.jpeg" xlink:show="embed" xlink:actuate="onLoad"/>
    <draw:fill-image draw:name="a66" xlink:href="media/image4.jpeg" xlink:show="embed" xlink:actuate="onLoad"/>
    <draw:fill-image draw:name="a1005" xlink:href="media/image4.jpeg" xlink:show="embed" xlink:actuate="onLoad"/>
    <draw:fill-image draw:name="a1308" xlink:href="media/image4.jpeg" xlink:show="embed" xlink:actuate="onLoad"/>
    <draw:fill-image draw:name="a187" xlink:href="media/image4.jpeg" xlink:show="embed" xlink:actuate="onLoad"/>
    <draw:fill-image draw:name="a325" xlink:href="media/image4.jpeg" xlink:show="embed" xlink:actuate="onLoad"/>
    <draw:fill-image draw:name="a241" xlink:href="media/image4.jpeg" xlink:show="embed" xlink:actuate="onLoad"/>
    <draw:fill-image draw:name="a0" xlink:href="media/image4.jpeg" xlink:show="embed" xlink:actuate="onLoad"/>
    <draw:fill-image draw:name="a1867" xlink:href="media/image4.jpeg" xlink:show="embed" xlink:actuate="onLoad"/>
    <draw:fill-image draw:name="a1142" xlink:href="media/image4.jpeg" xlink:show="embed" xlink:actuate="onLoad"/>
    <draw:fill-image draw:name="a120" xlink:href="media/image4.jpeg" xlink:show="embed" xlink:actuate="onLoad"/>
    <draw:fill-image draw:name="a1338" xlink:href="media/image4.jpeg" xlink:show="embed" xlink:actuate="onLoad"/>
    <draw:fill-image draw:name="a888" xlink:href="media/image4.jpeg" xlink:show="embed" xlink:actuate="onLoad"/>
    <draw:fill-image draw:name="a1621" xlink:href="media/image4.jpeg" xlink:show="embed" xlink:actuate="onLoad"/>
    <draw:fill-image draw:name="a905" xlink:href="media/image4.jpeg" xlink:show="embed" xlink:actuate="onLoad"/>
    <draw:fill-image draw:name="a1964" xlink:href="media/image4.jpeg" xlink:show="embed" xlink:actuate="onLoad"/>
    <draw:fill-image draw:name="a1801" xlink:href="media/image4.jpeg" xlink:show="embed" xlink:actuate="onLoad"/>
    <draw:fill-image draw:name="a467" xlink:href="media/image4.jpeg" xlink:show="embed" xlink:actuate="onLoad"/>
    <draw:fill-image draw:name="a769" xlink:href="media/image4.jpeg" xlink:show="embed" xlink:actuate="onLoad"/>
    <draw:fill-image draw:name="a1203" xlink:href="media/image4.jpeg" xlink:show="embed" xlink:actuate="onLoad"/>
    <draw:fill-image draw:name="a1505" xlink:href="media/image4.jpeg" xlink:show="embed" xlink:actuate="onLoad"/>
    <draw:fill-image draw:name="a1737" xlink:href="media/image4.jpeg" xlink:show="embed" xlink:actuate="onLoad"/>
    <draw:fill-image draw:name="a521" xlink:href="media/image4.jpeg" xlink:show="embed" xlink:actuate="onLoad"/>
    <table:table-template table:name="{5C22544A-7EE6-4342-B048-85BDC9FD1C3A}">
      <table:first-row table:style-name="a854" table:paragraph-style-name=""/>
      <table:last-row table:style-name="a855" table:paragraph-style-name=""/>
      <table:first-column table:style-name="a856" table:paragraph-style-name=""/>
      <table:last-column table:style-name="a857" table:paragraph-style-name=""/>
      <table:body table:style-name="a849" table:paragraph-style-name=""/>
      <table:even-rows table:style-name="a852" table:paragraph-style-name=""/>
      <table:odd-rows table:style-name="a853" table:paragraph-style-name=""/>
      <table:even-columns table:style-name="a850" table:paragraph-style-name=""/>
      <table:odd-columns table:style-name="a851" table:paragraph-style-name=""/>
    </table:table-template>
    <table:table-template table:name="{B301B821-A1FF-4177-AEE7-76D212191A09}">
      <table:first-row table:style-name="a861" table:paragraph-style-name=""/>
      <table:last-row table:style-name="a862" table:paragraph-style-name=""/>
      <table:first-column table:style-name="a863" table:paragraph-style-name=""/>
      <table:last-column table:style-name="a864" table:paragraph-style-name=""/>
      <table:body table:style-name="a858" table:paragraph-style-name=""/>
      <table:odd-rows table:style-name="a860" table:paragraph-style-name=""/>
      <table:odd-columns table:style-name="a859" table:paragraph-style-name=""/>
    </table:table-template>
    <table:table-template table:name="{9DCAF9ED-07DC-4A11-8D7F-57B35C25682E}">
      <table:first-row table:style-name="a868" table:paragraph-style-name=""/>
      <table:last-row table:style-name="a869" table:paragraph-style-name=""/>
      <table:first-column table:style-name="a870" table:paragraph-style-name=""/>
      <table:last-column table:style-name="a871" table:paragraph-style-name=""/>
      <table:body table:style-name="a865" table:paragraph-style-name=""/>
      <table:odd-rows table:style-name="a867" table:paragraph-style-name=""/>
      <table:odd-columns table:style-name="a866" table:paragraph-style-name=""/>
    </table:table-template>
    <table:table-template table:name="{3C2FFA5D-87B4-456A-9821-1D502468CF0F}">
      <table:first-row table:style-name="a877" table:paragraph-style-name=""/>
      <table:last-row table:style-name="a878" table:paragraph-style-name=""/>
      <table:first-column table:style-name="a879" table:paragraph-style-name=""/>
      <table:last-column table:style-name="a880" table:paragraph-style-name=""/>
      <table:body table:style-name="a872" table:paragraph-style-name=""/>
      <table:even-rows table:style-name="a875" table:paragraph-style-name=""/>
      <table:odd-rows table:style-name="a876" table:paragraph-style-name=""/>
      <table:even-columns table:style-name="a873" table:paragraph-style-name=""/>
      <table:odd-columns table:style-name="a874" table:paragraph-style-name=""/>
    </table:table-template>
    <table:table-template table:name="{6E25E649-3F16-4E02-A733-19D2CDBF48F0}">
      <table:first-row table:style-name="a884" table:paragraph-style-name=""/>
      <table:last-row table:style-name="a885" table:paragraph-style-name=""/>
      <table:first-column table:style-name="a886" table:paragraph-style-name=""/>
      <table:last-column table:style-name="a887" table:paragraph-style-name=""/>
      <table:body table:style-name="a881" table:paragraph-style-name=""/>
      <table:odd-rows table:style-name="a883" table:paragraph-style-name=""/>
      <table:odd-columns table:style-name="a8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 style:parent-style-name="Graphics">
      <style:graphic-properties draw:fill="none" fo:clip="rect(0in, 0in, -0.01302in, 0in)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draw:fill="none" draw:stroke="solid" svg:stroke-width="0.01389in" svg:stroke-color="#000000" svg:stroke-opacity="100%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bitmap" draw:fill-image-name="a467" style:repeat="stretch" draw:opacity="45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bitmap" draw:fill-image-name="a241" style:repeat="stretch" draw:opacity="45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5in" fo:padding-bottom="0.05in" fo:padding-left="0.1in" fo:padding-right="0.1in" draw:textarea-vertical-align="top" draw:textarea-horizontal-align="left" draw:fill="gradient" draw:fill-gradient-name="a245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 style:parent-style-name="Graphics">
      <style:graphic-properties draw:fill="none" fo:clip="rect(0in, 0in, -0.01302in, 0in)" draw:stroke="none"/>
    </style:style>
    <style:style style:family="graphic" style:name="a248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gradient" draw:fill-gradient-name="a471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 style:parent-style-name="Graphics">
      <style:graphic-properties draw:fill="none" fo:clip="rect(0in, 0in, -0.01302in, 0in)" draw:stroke="none"/>
    </style:style>
    <style:style style:family="graphic" style:name="a4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5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6">
      <style:graphic-properties draw:fill="none" draw:stroke="solid" svg:stroke-width="0.02083in" svg:stroke-color="#b0a697" svg:stroke-opacity="100%" draw:stroke-linejoin="miter" svg:stroke-linecap="butt"/>
    </style:style>
    <style:style style:family="graphic" style:name="a717">
      <style:graphic-properties draw:fill="none" draw:stroke="solid" svg:stroke-width="0.02083in" svg:stroke-color="#b0a697" svg:stroke-opacity="100%" draw:stroke-linejoin="miter" svg:stroke-linecap="butt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solid" svg:stroke-width="0.01389in" svg:stroke-color="#000000" svg:stroke-opacity="100%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draw:opacity="45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in, 0in, -0.01302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solid" svg:stroke-width="0.01389in" svg:stroke-color="#000000" svg:stroke-opacity="100%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2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bitmap" draw:fill-image-name="a521" style:repeat="stretch" draw:opacity="45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gradient" draw:fill-gradient-name="a525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 style:parent-style-name="Graphics">
      <style:graphic-properties draw:fill="none" fo:clip="rect(0in, 0in, -0.01302in, 0in)" draw:stroke="none"/>
    </style:style>
    <style:style style:family="graphic" style:name="a52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draw:fill="none" draw:stroke="solid" svg:stroke-width="0.01389in" svg:stroke-color="#000000" svg:stroke-opacity="100%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bitmap" draw:fill-image-name="a769" style:repeat="stretch" draw:opacity="45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gradient" draw:fill-gradient-name="a773" draw:stroke="none" draw:auto-grow-width="false" draw:auto-grow-height="false"/>
      <style:paragraph-properties style:font-independent-line-spacing="true" style:writing-mode="lr-tb"/>
    </style:style>
    <style:style style:family="graphic" style:name="a775" style:parent-style-name="Graphics">
      <style:graphic-properties draw:fill="none" fo:clip="rect(0in, 0in, -0.01302in, 0in)" draw:stroke="none"/>
    </style:style>
    <style:style style:family="graphic" style:name="a77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bitmap" draw:fill-image-name="a325" style:repeat="stretch" draw:opacity="45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.05in" fo:padding-bottom="0.05in" fo:padding-left="0.1in" fo:padding-right="0.1in" draw:textarea-vertical-align="top" draw:textarea-horizontal-align="left" draw:fill="gradient" draw:fill-gradient-name="a329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 style:parent-style-name="Graphics">
      <style:graphic-properties draw:fill="none" fo:clip="rect(0in, 0in, -0.01302in, 0in)" draw:stroke="none"/>
    </style:style>
    <style:style style:family="graphic" style:name="a33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bitmap" draw:fill-image-name="a566" style:repeat="stretch" draw:opacity="45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6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gradient" draw:fill-gradient-name="a570" draw:stroke="none" draw:auto-grow-width="false" draw:auto-grow-height="false"/>
      <style:paragraph-properties style:font-independent-line-spacing="true" style:writing-mode="lr-tb"/>
    </style:style>
    <style:style style:family="graphic" style:name="a572" style:parent-style-name="Graphics">
      <style:graphic-properties draw:fill="none" fo:clip="rect(0in, 0in, -0.01302in, 0in)" draw:stroke="non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gradient" draw:fill-gradient-name="a799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gradient" draw:fill-gradient-name="a803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">
      <style:drawing-page-properties draw:fill="bitmap" draw:fill-image-name="a120" style:repeat="stretch" draw:opacity="45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top" draw:textarea-horizontal-align="left" draw:fill="gradient" draw:fill-gradient-name="a124" draw:stroke="none" draw:auto-grow-width="false" draw:auto-grow-height="false"/>
      <style:paragraph-properties style:font-independent-line-spacing="true" style:writing-mode="lr-tb"/>
    </style:style>
    <style:style style:family="graphic" style:name="a126" style:parent-style-name="Graphics">
      <style:graphic-properties draw:fill="none" fo:clip="rect(0in, 0in, -0.01302in, 0in)" draw:stroke="non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3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draw:fill="none" draw:stroke="solid" svg:stroke-width="0.01389in" svg:stroke-color="#000000" svg:stroke-opacity="100%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none" draw:stroke="solid" svg:stroke-width="0.01389in" svg:stroke-color="#000000" svg:stroke-opacity="100%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draw:fill="none" draw:stroke="solid" svg:stroke-width="0.01389in" svg:stroke-color="#000000" svg:stroke-opacity="100%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bitmap" draw:fill-image-name="a637" style:repeat="stretch" draw:opacity="45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">
      <style:graphic-properties draw:fill="none" draw:stroke="solid" svg:stroke-width="0.01389in" svg:stroke-color="#000000" svg:stroke-opacity="100%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">
      <style:drawing-page-properties draw:fill="bitmap" draw:fill-image-name="a187" style:repeat="stretch" draw:opacity="45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gradient" draw:fill-gradient-name="a641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bitmap" draw:fill-image-name="a417" style:repeat="stretch" draw:opacity="45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in, 0in, -0.01302in, 0in)" draw:stroke="none"/>
    </style:style>
    <style:style style:family="graphic" style:name="a64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top" draw:textarea-horizontal-align="left" draw:fill="gradient" draw:fill-gradient-name="a191" draw:stroke="none" draw:auto-grow-width="false" draw:auto-grow-height="false"/>
      <style:paragraph-properties style:font-independent-line-spacing="true" style:writing-mode="lr-tb"/>
    </style:style>
    <style:style style:family="graphic" style:name="a193" style:parent-style-name="Graphics">
      <style:graphic-properties draw:fill="none" fo:clip="rect(0in, 0in, -0.01302in, 0in)" draw:stroke="non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gradient" draw:fill-gradient-name="a421" draw:stroke="none" draw:auto-grow-width="false" draw:auto-grow-height="false"/>
      <style:paragraph-properties style:font-independent-line-spacing="true" style:writing-mode="lr-tb"/>
    </style:style>
    <style:style style:family="graphic" style:name="a423" style:parent-style-name="Graphics">
      <style:graphic-properties draw:fill="none" fo:clip="rect(0in, 0in, -0.01302in, 0in)" draw:stroke="non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draw:opacity="45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2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Галерия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5.png" xlink:type="simple" xlink:show="embed" xlink:actuate="onLoad"/>
        <svg:title/>
        <svg:desc/>
      </draw:frame>
      <draw:frame draw:id="id2" presentation:style-name="a10" draw:name="Title Placeholder 1" svg:x="1.41553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Редакт. стил загл. образец</text:span><text:span text:style-name="a8" text:class-names=""/></text:p>
        </draw:text-box>
        <svg:title/>
        <svg:desc/>
      </draw:frame>
      <draw:frame draw:id="id3" presentation:style-name="a27" draw:name="Text Placeholder 2" svg:x="1.41553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Щракнете, за да редактирате стиловете на текста в образеца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Второ ниво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Пето ниво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08937in" svg:y="6.93438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5/31/2026</text:date></text:span></text:p>
        </draw:text-box>
        <svg:title/>
        <svg:desc/>
      </draw:frame>
      <draw:frame draw:id="id5" presentation:style-name="a34" draw:name="Footer Placeholder 4" svg:x="1.41553in" svg:y="6.93321in" svg:width="6.49479in" svg:height="0.33815in" presentation:class="footer" presentation:placeholder="false">
        <draw:text-box>
          <text:p text:style-name="a33" text:class-names="" text:cond-style-name=""><text:span text:style-name="a32" text:class-names="">Add Footer Here</text:span></text:p>
        </draw:text-box>
        <svg:title/>
        <svg:desc/>
      </draw:frame>
      <draw:connector draw:type="line" svg:x1="0in" svg:y1="6.70211in" svg:x2="13.33333in" svg:y2="6.70211in" draw:id="id6" draw:style-name="a35" draw:name="Straight Connector 9">
        <svg:title/>
        <svg:desc/>
      </draw:connector>
      <presentation:notes style:page-layout-name="pageLayout2" draw:style-name="a65">
        <draw:frame draw:id="id7" presentation:style-name="a38" draw:name="Header Placeholder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5/31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" draw:name="Slide Image Placeholder 3">
          <svg:title/>
          <svg:desc/>
        </draw:page-thumbnail>
        <draw:frame draw:id="id10" presentation:style-name="a58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2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Заглавен-слайд" style:page-layout-name="pageLayout1" draw:style-name="a67">
      <draw:custom-shape svg:x="0in" svg:y="2.20853in" svg:width="13.33333in" svg:height="4.49031in" draw:id="id13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72" draw:name="Picture 6" svg:x="0in" svg:y="6.7in" svg:width="13.33333in" svg:height="0.8125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6.70211in" svg:x2="13.33333in" svg:y2="6.70211in" draw:id="id15" draw:layer="Master1-bg" draw:style-name="a73" draw:name="Straight Connector 9">
        <svg:title/>
        <svg:desc/>
      </draw:connector>
      <draw:frame draw:id="id16" presentation:style-name="a77" draw:name="Title 1" svg:x="1.94386in" svg:y="0.8774in" svg:width="9.44562in" svg:height="2.77934in" presentation:class="title" presentation:placeholder="false">
        <draw:text-box>
          <text:p text:style-name="a76" text:class-names="" text:cond-style-name=""><text:span text:style-name="a74" text:class-names="">Редакт. стил загл. образец</text:span><text:span text:style-name="a75" text:class-names=""/></text:p>
        </draw:text-box>
        <svg:title/>
        <svg:desc/>
      </draw:frame>
      <draw:frame draw:id="id17" presentation:style-name="a81" draw:name="Subtitle 2" svg:x="1.94386in" svg:y="3.86177in" svg:width="9.44562in" svg:height="1.06914in" presentation:class="subtitle" presentation:placeholder="false">
        <draw:text-box>
          <text:p text:style-name="a80" text:class-names="" text:cond-style-name=""><text:span text:style-name="a78" text:class-names="">Щракнете, за да редактирате стила на подзаглавието в образеца</text:span><text:span text:style-name="a79" text:class-names=""/></text:p>
        </draw:text-box>
        <svg:title/>
        <svg:desc/>
      </draw:frame>
      <draw:frame draw:id="id18" presentation:style-name="a85" draw:name="Date Placeholder 3" svg:x="7.56105in" svg:y="6.96679in" svg:width="3.82843in" svg:height="0.33815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5/31/2026</text:date></text:span></text:p>
        </draw:text-box>
        <svg:title/>
        <svg:desc/>
      </draw:frame>
      <draw:frame draw:id="id19" presentation:style-name="a88" draw:name="Footer Placeholder 4" svg:x="1.94386in" svg:y="6.96679in" svg:width="5.43954in" svg:height="0.33815in" presentation:class="footer" presentation:placeholder="false">
        <draw:text-box>
          <text:p text:style-name="a87" text:class-names="" text:cond-style-name=""><text:span text:style-name="a86" text:class-names="">Add Footer Here</text:span></text:p>
        </draw:text-box>
        <svg:title/>
        <svg:desc/>
      </draw:frame>
      <draw:connector draw:type="line" svg:x1="1.94386in" svg:y1="3.85886in" svg:x2="11.38948in" svg:y2="3.85886in" draw:id="id20" draw:style-name="a89" draw:name="Straight Connector 14">
        <svg:title/>
        <svg:desc/>
      </draw:connector>
      <presentation:notes style:page-layout-name="pageLayout2" draw:style-name="a119">
        <draw:frame draw:id="id7" presentation:style-name="a92" draw:name="Header Placeholder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8" presentation:style-name="a96" draw:name="Date Placeholder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5/31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7" draw:name="Slide Image Placeholder 3">
          <svg:title/>
          <svg:desc/>
        </draw:page-thumbnail>
        <draw:frame draw:id="id10" presentation:style-name="a112" draw:name="Notes Placeholder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2" presentation:style-name="a118" draw:name="Slide Number Placehold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Заглавие-и-съдържание" style:page-layout-name="pageLayout1" draw:style-name="a121">
      <draw:custom-shape svg:x="0in" svg:y="2.20853in" svg:width="13.33333in" svg:height="4.49031in" draw:id="id21" draw:layer="Master1-bg" draw:style-name="a125" draw:name="Rectangle 7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layer="Master1-bg" draw:style-name="a126" draw:name="Picture 6" svg:x="0in" svg:y="6.7in" svg:width="13.33333in" svg:height="0.8125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6.70211in" svg:x2="13.33333in" svg:y2="6.70211in" draw:id="id23" draw:layer="Master1-bg" draw:style-name="a127" draw:name="Straight Connector 9">
        <svg:title/>
        <svg:desc/>
      </draw:connector>
      <draw:frame draw:id="id24" presentation:style-name="a144" draw:name="Content Placeholder 2" svg:x="1.41553in" svg:y="2.20443in" svg:width="10.50227in" svg:height="3.77364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Щракнете, за да редактирате стиловете на текста в образеца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Второ ниво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Пето ниво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8" draw:name="Date Placeholder 3" svg:x="8.08937in" svg:y="6.93438in" svg:width="3.82843in" svg:height="0.33815in" presentation:class="date-time" presentation:placeholder="false">
        <draw:text-box>
          <text:p text:style-name="a147" text:class-names="" text:cond-style-name=""><text:span text:style-name="a145" text:class-names=""><text:date text:fixed="false" style:data-style-name="a146">5/31/2026</text:date></text:span></text:p>
        </draw:text-box>
        <svg:title/>
        <svg:desc/>
      </draw:frame>
      <draw:frame draw:id="id26" presentation:style-name="a151" draw:name="Footer Placeholder 4" svg:x="1.41553in" svg:y="6.93321in" svg:width="6.49479in" svg:height="0.33815in" presentation:class="footer" presentation:placeholder="false">
        <draw:text-box>
          <text:p text:style-name="a150" text:class-names="" text:cond-style-name=""><text:span text:style-name="a149" text:class-names="">Add Footer Here</text:span></text:p>
        </draw:text-box>
        <svg:title/>
        <svg:desc/>
      </draw:frame>
      <draw:connector draw:type="line" svg:x1="1.41321in" svg:y1="1.62577in" svg:x2="11.92012in" svg:y2="1.62577in" draw:id="id27" draw:style-name="a152" draw:name="Straight Connector 32">
        <svg:title/>
        <svg:desc/>
      </draw:connector>
      <draw:frame draw:id="id28" presentation:style-name="a156" draw:name="Title 5" svg:x="1.41553in" svg:y="0.87983in" svg:width="10.50227in" svg:height="1.14746in" presentation:class="title" presentation:placeholder="false">
        <draw:text-box>
          <text:p text:style-name="a155" text:class-names="" text:cond-style-name=""><text:span text:style-name="a153" text:class-names="">Редакт. стил загл. образец</text:span><text:span text:style-name="a154" text:class-names=""/></text:p>
        </draw:text-box>
        <svg:title/>
        <svg:desc/>
      </draw:frame>
      <presentation:notes style:page-layout-name="pageLayout2" draw:style-name="a186">
        <draw:frame draw:id="id7" presentation:style-name="a159" draw:name="Header Placeholder 1" svg:x="0in" svg:y="0in" svg:width="3.25in" svg:height="0.50174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8" presentation:style-name="a163" draw:name="Date Placeholder 2" svg:x="4.24826in" svg:y="0in" svg:width="3.25in" svg:height="0.50174in" presentation:class="date-time" presentation:placeholder="false">
          <draw:text-box>
            <text:p text:style-name="a162" text:class-names="" text:cond-style-name=""><text:span text:style-name="a160" text:class-names=""><text:date text:fixed="false" style:data-style-name="a161">5/31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64" draw:name="Slide Image Placeholder 3">
          <svg:title/>
          <svg:desc/>
        </draw:page-thumbnail>
        <draw:frame draw:id="id10" presentation:style-name="a179" draw:name="Notes Placeholder 4" svg:x="0.75in" svg:y="4.8125in" svg:width="6in" svg:height="3.9375in" presentation:class="notes" presentation:placeholder="false">
          <draw:text-box>
            <text:p text:style-name="a166" text:class-names="" text:cond-style-name=""><text:span text:style-name="a165" text:class-names="">Click to edit Master text styles</text:span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Second level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2" presentation:style-name="a185" draw:name="Slide Number Placeholder 6" svg:x="4.24826in" svg:y="9.49826in" svg:width="3.25in" svg:height="0.50174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лавка-разд." style:page-layout-name="pageLayout1" draw:style-name="a188">
      <draw:custom-shape svg:x="0in" svg:y="2.20853in" svg:width="13.33333in" svg:height="4.49031in" draw:id="id29" draw:layer="Master1-bg" draw:style-name="a192" draw:name="Rectangle 7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draw:layer="Master1-bg" draw:style-name="a193" draw:name="Picture 6" svg:x="0in" svg:y="6.7in" svg:width="13.33333in" svg:height="0.8125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6.70211in" svg:x2="13.33333in" svg:y2="6.70211in" draw:id="id31" draw:layer="Master1-bg" draw:style-name="a194" draw:name="Straight Connector 9">
        <svg:title/>
        <svg:desc/>
      </draw:connector>
      <draw:frame draw:id="id32" presentation:style-name="a198" draw:name="Title 1" svg:x="1.94053in" svg:y="1.92053in" svg:width="9.45227in" svg:height="2.06469in" presentation:class="title" presentation:placeholder="false">
        <draw:text-box>
          <text:p text:style-name="a197" text:class-names="" text:cond-style-name=""><text:span text:style-name="a195" text:class-names="">Редакт. стил загл. образец</text:span><text:span text:style-name="a196" text:class-names=""/></text:p>
        </draw:text-box>
        <svg:title/>
        <svg:desc/>
      </draw:frame>
      <draw:frame draw:id="id33" presentation:style-name="a202" draw:name="Text Placeholder 2" svg:x="1.94748in" svg:y="4.16251in" svg:width="9.43837in" svg:height="1.10775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34" presentation:style-name="a206" draw:name="Date Placeholder 3" svg:x="8.08937in" svg:y="6.93438in" svg:width="3.82843in" svg:height="0.33815in" presentation:class="date-time" presentation:placeholder="false">
        <draw:text-box>
          <text:p text:style-name="a205" text:class-names="" text:cond-style-name=""><text:span text:style-name="a203" text:class-names=""><text:date text:fixed="false" style:data-style-name="a204">5/31/2026</text:date></text:span></text:p>
        </draw:text-box>
        <svg:title/>
        <svg:desc/>
      </draw:frame>
      <draw:frame draw:id="id35" presentation:style-name="a209" draw:name="Footer Placeholder 4" svg:x="1.41553in" svg:y="6.93321in" svg:width="6.49479in" svg:height="0.33815in" presentation:class="footer" presentation:placeholder="false">
        <draw:text-box>
          <text:p text:style-name="a208" text:class-names="" text:cond-style-name=""><text:span text:style-name="a207" text:class-names="">Add Footer Here</text:span></text:p>
        </draw:text-box>
        <svg:title/>
        <svg:desc/>
      </draw:frame>
      <draw:connector draw:type="line" svg:x1="1.94748in" svg:y1="4.16118in" svg:x2="11.38585in" svg:y2="4.16118in" draw:id="id36" draw:style-name="a210" draw:name="Straight Connector 14">
        <svg:title/>
        <svg:desc/>
      </draw:connector>
      <presentation:notes style:page-layout-name="pageLayout2" draw:style-name="a240">
        <draw:frame draw:id="id7" presentation:style-name="a213" draw:name="Header Placeholder 1" svg:x="0in" svg:y="0in" svg:width="3.25in" svg:height="0.50174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7" draw:name="Date Placeholder 2" svg:x="4.24826in" svg:y="0in" svg:width="3.25in" svg:height="0.50174in" presentation:class="date-time" presentation:placeholder="false">
          <draw:text-box>
            <text:p text:style-name="a216" text:class-names="" text:cond-style-name=""><text:span text:style-name="a214" text:class-names=""><text:date text:fixed="false" style:data-style-name="a215">5/31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8" draw:name="Slide Image Placeholder 3">
          <svg:title/>
          <svg:desc/>
        </draw:page-thumbnail>
        <draw:frame draw:id="id10" presentation:style-name="a233" draw:name="Notes Placeholder 4" svg:x="0.75in" svg:y="4.8125in" svg:width="6in" svg:height="3.9375in" presentation:class="notes" presentation:placeholder="false">
          <draw:text-box>
            <text:p text:style-name="a220" text:class-names="" text:cond-style-name=""><text:span text:style-name="a219" text:class-names="">Click to edit Master text styles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cond level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2" presentation:style-name="a239" draw:name="Slide Number Placeholder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Две-съдържания" style:page-layout-name="pageLayout1" draw:style-name="a242">
      <draw:custom-shape svg:x="0in" svg:y="2.20853in" svg:width="13.33333in" svg:height="4.49031in" draw:id="id37" draw:layer="Master1-bg" draw:style-name="a246" draw:name="Rectangle 7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draw:layer="Master1-bg" draw:style-name="a247" draw:name="Picture 6" svg:x="0in" svg:y="6.7in" svg:width="13.33333in" svg:height="0.8125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6.70211in" svg:x2="13.33333in" svg:y2="6.70211in" draw:id="id39" draw:layer="Master1-bg" draw:style-name="a248" draw:name="Straight Connector 9">
        <svg:title/>
        <svg:desc/>
      </draw:connector>
      <draw:frame draw:id="id40" presentation:style-name="a265" draw:name="Content Placeholder 2" svg:x="1.41321in" svg:y="2.36423in" svg:width="5.08in" svg:height="3.77143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Щракнете, за да редактирате стиловете на текста в образеца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Второ ниво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Пето ниво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2" draw:name="Content Placeholder 3" svg:x="6.84457in" svg:y="2.3713in" svg:width="5.08in" svg:height="3.76369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Щракнете, за да редактирате стиловете на текста в образеца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Второ ниво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Пето ниво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86" draw:name="Date Placeholder 4" svg:x="8.08937in" svg:y="6.93438in" svg:width="3.82843in" svg:height="0.33815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5/31/2026</text:date></text:span></text:p>
        </draw:text-box>
        <svg:title/>
        <svg:desc/>
      </draw:frame>
      <draw:frame draw:id="id43" presentation:style-name="a289" draw:name="Footer Placeholder 5" svg:x="1.41553in" svg:y="6.93321in" svg:width="6.49479in" svg:height="0.33815in" presentation:class="footer" presentation:placeholder="false">
        <draw:text-box>
          <text:p text:style-name="a288" text:class-names="" text:cond-style-name=""><text:span text:style-name="a287" text:class-names="">Add Footer Here</text:span></text:p>
        </draw:text-box>
        <svg:title/>
        <svg:desc/>
      </draw:frame>
      <draw:connector draw:type="line" svg:x1="1.41321in" svg:y1="1.62577in" svg:x2="11.92012in" svg:y2="1.62577in" draw:id="id44" draw:style-name="a290" draw:name="Straight Connector 8">
        <svg:title/>
        <svg:desc/>
      </draw:connector>
      <draw:frame draw:id="id45" presentation:style-name="a294" draw:name="Title 6" svg:x="1.41553in" svg:y="0.87983in" svg:width="10.50227in" svg:height="1.14746in" presentation:class="title" presentation:placeholder="false">
        <draw:text-box>
          <text:p text:style-name="a293" text:class-names="" text:cond-style-name=""><text:span text:style-name="a291" text:class-names="">Редакт. стил загл. образец</text:span><text:span text:style-name="a292" text:class-names=""/></text:p>
        </draw:text-box>
        <svg:title/>
        <svg:desc/>
      </draw:frame>
      <presentation:notes style:page-layout-name="pageLayout2" draw:style-name="a324">
        <draw:frame draw:id="id7" presentation:style-name="a297" draw:name="Header Placeholder 1" svg:x="0in" svg:y="0in" svg:width="3.25in" svg:height="0.50174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8" presentation:style-name="a301" draw:name="Date Placeholder 2" svg:x="4.24826in" svg:y="0in" svg:width="3.25in" svg:height="0.50174in" presentation:class="date-time" presentation:placeholder="false">
          <draw:text-box>
            <text:p text:style-name="a300" text:class-names="" text:cond-style-name=""><text:span text:style-name="a298" text:class-names=""><text:date text:fixed="false" style:data-style-name="a299">5/31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02" draw:name="Slide Image Placeholder 3">
          <svg:title/>
          <svg:desc/>
        </draw:page-thumbnail>
        <draw:frame draw:id="id10" presentation:style-name="a317" draw:name="Notes Placeholder 4" svg:x="0.75in" svg:y="4.8125in" svg:width="6in" svg:height="3.9375in" presentation:class="notes" presentation:placeholder="false">
          <draw:text-box>
            <text:p text:style-name="a304" text:class-names="" text:cond-style-name=""><text:span text:style-name="a303" text:class-names="">Click to edit Master text styles</text:span></text:p>
            <text:list text:style-name="a307">
              <text:list-item>
                <text:list text:style-name="a307">
                  <text:list-item>
                    <text:p text:style-name="a306" text:class-names="" text:cond-style-name=""><text:span text:style-name="a305" text:class-names="">Second level</text:span></text:p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p text:style-name="a309" text:class-names="" text:cond-style-name=""><text:span text:style-name="a3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p text:style-name="a312" text:class-names="" text:cond-style-name=""><text:span text:style-name="a3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2" presentation:style-name="a323" draw:name="Slide Number Placeholder 6" svg:x="4.24826in" svg:y="9.49826in" svg:width="3.25in" svg:height="0.50174in" presentation:class="page-number" presentation:placeholder="false">
          <draw:text-box>
            <text:p text:style-name="a322" text:class-names="" text:cond-style-name=""><text:span text:style-name="a3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Сравнение" style:page-layout-name="pageLayout1" draw:style-name="a326">
      <draw:custom-shape svg:x="0in" svg:y="2.20853in" svg:width="13.33333in" svg:height="4.49031in" draw:id="id46" draw:layer="Master1-bg" draw:style-name="a330" draw:name="Rectangle 7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draw:layer="Master1-bg" draw:style-name="a331" draw:name="Picture 6" svg:x="0in" svg:y="6.7in" svg:width="13.33333in" svg:height="0.8125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6.70211in" svg:x2="13.33333in" svg:y2="6.70211in" draw:id="id48" draw:layer="Master1-bg" draw:style-name="a332" draw:name="Straight Connector 9">
        <svg:title/>
        <svg:desc/>
      </draw:connector>
      <draw:frame draw:id="id49" presentation:style-name="a336" draw:name="Text Placeholder 2" svg:x="1.40782in" svg:y="2.13342in" svg:width="5.08in" svg:height="0.87702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50" presentation:style-name="a353" draw:name="Content Placeholder 3" svg:x="1.40782in" svg:y="3.01347in" svg:width="5.08in" svg:height="2.89201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Щракнете, за да редактирате стиловете на текста в образеца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Второ ниво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9" text:class-names="">Пето ниво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57" draw:name="Text Placeholder 4" svg:x="6.8378in" svg:y="2.13719in" svg:width="5.08in" svg:height="0.87734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52" presentation:style-name="a374" draw:name="Content Placeholder 5" svg:x="6.8378in" svg:y="3.01043in" svg:width="5.08in" svg:height="2.88426in" presentation:class="object" presentation:placeholder="false">
        <draw:text-box>
          <text:list text:style-name="a360">
            <text:list-item>
              <text:p text:style-name="a359" text:class-names="" text:cond-style-name=""><text:span text:style-name="a358" text:class-names="">Щракнете, за да редактирате стиловете на текста в образеца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Второ ниво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0" text:class-names="">Пето ниво</text:span><text:span text:style-name="a3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8" draw:name="Date Placeholder 6" svg:x="8.08937in" svg:y="6.93438in" svg:width="3.82843in" svg:height="0.33815in" presentation:class="date-time" presentation:placeholder="false">
        <draw:text-box>
          <text:p text:style-name="a377" text:class-names="" text:cond-style-name=""><text:span text:style-name="a375" text:class-names=""><text:date text:fixed="false" style:data-style-name="a376">5/31/2026</text:date></text:span></text:p>
        </draw:text-box>
        <svg:title/>
        <svg:desc/>
      </draw:frame>
      <draw:frame draw:id="id54" presentation:style-name="a381" draw:name="Footer Placeholder 7" svg:x="1.41553in" svg:y="6.93321in" svg:width="6.49479in" svg:height="0.33815in" presentation:class="footer" presentation:placeholder="false">
        <draw:text-box>
          <text:p text:style-name="a380" text:class-names="" text:cond-style-name=""><text:span text:style-name="a379" text:class-names="">Add Footer Here</text:span></text:p>
        </draw:text-box>
        <svg:title/>
        <svg:desc/>
      </draw:frame>
      <draw:connector draw:type="line" svg:x1="1.41321in" svg:y1="1.62577in" svg:x2="11.92012in" svg:y2="1.62577in" draw:id="id55" draw:style-name="a382" draw:name="Straight Connector 10">
        <svg:title/>
        <svg:desc/>
      </draw:connector>
      <draw:frame draw:id="id56" presentation:style-name="a386" draw:name="Title 8" svg:x="1.41553in" svg:y="0.87983in" svg:width="10.50227in" svg:height="1.14746in" presentation:class="title" presentation:placeholder="false">
        <draw:text-box>
          <text:p text:style-name="a385" text:class-names="" text:cond-style-name=""><text:span text:style-name="a383" text:class-names="">Редакт. стил загл. образец</text:span><text:span text:style-name="a384" text:class-names=""/></text:p>
        </draw:text-box>
        <svg:title/>
        <svg:desc/>
      </draw:frame>
      <presentation:notes style:page-layout-name="pageLayout2" draw:style-name="a416">
        <draw:frame draw:id="id7" presentation:style-name="a389" draw:name="Header Placehold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8" presentation:style-name="a393" draw:name="Date Placehold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5/31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94" draw:name="Slide Image Placeholder 3">
          <svg:title/>
          <svg:desc/>
        </draw:page-thumbnail>
        <draw:frame draw:id="id10" presentation:style-name="a409" draw:name="Notes Placehold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Click to edit Master text styles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 le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2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Само-заглавие" style:page-layout-name="pageLayout1" draw:style-name="a418">
      <draw:custom-shape svg:x="0in" svg:y="2.20853in" svg:width="13.33333in" svg:height="4.49031in" draw:id="id57" draw:layer="Master1-bg" draw:style-name="a422" draw:name="Rectangle 7">
        <svg:title/>
        <svg:desc/>
        <text:p text:style-name="a420" text:class-names="" text:cond-style-name=""><text:span text:style-name="a4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423" draw:name="Picture 6" svg:x="0in" svg:y="6.7in" svg:width="13.33333in" svg:height="0.8125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424" draw:name="Straight Connector 9">
        <svg:title/>
        <svg:desc/>
      </draw:connector>
      <draw:frame draw:id="id60" presentation:style-name="a428" draw:name="Date Placeholder 2" svg:x="8.08937in" svg:y="6.93438in" svg:width="3.82843in" svg:height="0.33815in" presentation:class="date-time" presentation:placeholder="false">
        <draw:text-box>
          <text:p text:style-name="a427" text:class-names="" text:cond-style-name=""><text:span text:style-name="a425" text:class-names=""><text:date text:fixed="false" style:data-style-name="a426">5/31/2026</text:date></text:span></text:p>
        </draw:text-box>
        <svg:title/>
        <svg:desc/>
      </draw:frame>
      <draw:frame draw:id="id61" presentation:style-name="a431" draw:name="Footer Placeholder 3" svg:x="1.41553in" svg:y="6.93321in" svg:width="6.49479in" svg:height="0.33815in" presentation:class="footer" presentation:placeholder="false">
        <draw:text-box>
          <text:p text:style-name="a430" text:class-names="" text:cond-style-name=""><text:span text:style-name="a429" text:class-names="">Add Footer Here</text:span></text:p>
        </draw:text-box>
        <svg:title/>
        <svg:desc/>
      </draw:frame>
      <draw:connector draw:type="line" svg:x1="1.41321in" svg:y1="1.62577in" svg:x2="11.92012in" svg:y2="1.62577in" draw:id="id62" draw:style-name="a432" draw:name="Straight Connector 6">
        <svg:title/>
        <svg:desc/>
      </draw:connector>
      <draw:frame draw:id="id63" presentation:style-name="a436" draw:name="Title 4" svg:x="1.41553in" svg:y="0.87983in" svg:width="10.50227in" svg:height="1.14746in" presentation:class="title" presentation:placeholder="false">
        <draw:text-box>
          <text:p text:style-name="a435" text:class-names="" text:cond-style-name=""><text:span text:style-name="a433" text:class-names="">Редакт. стил загл. образец</text:span><text:span text:style-name="a434" text:class-names=""/></text:p>
        </draw:text-box>
        <svg:title/>
        <svg:desc/>
      </draw:frame>
      <presentation:notes style:page-layout-name="pageLayout2" draw:style-name="a466">
        <draw:frame draw:id="id7" presentation:style-name="a439" draw:name="Header Placehold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8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5/31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44" draw:name="Slide Image Placeholder 3">
          <svg:title/>
          <svg:desc/>
        </draw:page-thumbnail>
        <draw:frame draw:id="id10" presentation:style-name="a459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2" presentation:style-name="a465" draw:name="Slide Number Placeholder 6" svg:x="4.24826in" svg:y="9.49826in" svg:width="3.25in" svg:height="0.50174in" presentation:class="page-number" presentation:placeholder="false">
          <draw:text-box>
            <text:p text:style-name="a464" text:class-names="" text:cond-style-name=""><text:span text:style-name="a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1_Title-Only" style:page-layout-name="pageLayout1" draw:style-name="a468">
      <draw:custom-shape svg:x="0in" svg:y="2.20853in" svg:width="13.33333in" svg:height="4.49031in" draw:id="id64" draw:layer="Master1-bg" draw:style-name="a472" draw:name="Rectangle 7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draw:layer="Master1-bg" draw:style-name="a473" draw:name="Picture 6" svg:x="0in" svg:y="6.7in" svg:width="13.33333in" svg:height="0.8125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6.70211in" svg:x2="13.33333in" svg:y2="6.70211in" draw:id="id66" draw:layer="Master1-bg" draw:style-name="a474" draw:name="Straight Connector 9">
        <svg:title/>
        <svg:desc/>
      </draw:connector>
      <draw:frame draw:id="id67" presentation:style-name="a478" draw:name="Date Placeholder 2" svg:x="8.08937in" svg:y="6.93438in" svg:width="3.82843in" svg:height="0.33815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5/31/2026</text:date></text:span></text:p>
        </draw:text-box>
        <svg:title/>
        <svg:desc/>
      </draw:frame>
      <draw:frame draw:id="id68" presentation:style-name="a481" draw:name="Footer Placeholder 3" svg:x="1.41553in" svg:y="6.93321in" svg:width="6.49479in" svg:height="0.33815in" presentation:class="footer" presentation:placeholder="false">
        <draw:text-box>
          <text:p text:style-name="a480" text:class-names="" text:cond-style-name=""><text:span text:style-name="a479" text:class-names="">Add Footer Here</text:span></text:p>
        </draw:text-box>
        <svg:title/>
        <svg:desc/>
      </draw:frame>
      <draw:connector draw:type="line" svg:x1="1.41321in" svg:y1="1.62577in" svg:x2="11.92012in" svg:y2="1.62577in" draw:id="id69" draw:style-name="a482" draw:name="Straight Connector 6">
        <svg:title/>
        <svg:desc/>
      </draw:connector>
      <draw:frame draw:id="id70" presentation:style-name="a486" draw:name="Title 4" svg:x="1.41553in" svg:y="0.87983in" svg:width="10.50227in" svg:height="1.14746in" presentation:class="title" presentation:placeholder="false">
        <draw:text-box>
          <text:p text:style-name="a485" text:class-names="" text:cond-style-name=""><text:span text:style-name="a483" text:class-names="">Редакт. стил загл. образец</text:span><text:span text:style-name="a484" text:class-names=""/></text:p>
        </draw:text-box>
        <svg:title/>
        <svg:desc/>
      </draw:frame>
      <draw:frame draw:id="id71" presentation:style-name="a490" draw:name="Text Placeholder 5" svg:x="1.8533in" svg:y="2.03963in" svg:width="9.62674in" svg:height="3.42074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presentation:notes style:page-layout-name="pageLayout2" draw:style-name="a520">
        <draw:frame draw:id="id7" presentation:style-name="a493" draw:name="Header Placeholder 1" svg:x="0in" svg:y="0in" svg:width="3.25in" svg:height="0.5017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7" draw:name="Date Placeholder 2" svg:x="4.24826in" svg:y="0in" svg:width="3.25in" svg:height="0.50174in" presentation:class="date-time" presentation:placeholder="false">
          <draw:text-box>
            <text:p text:style-name="a496" text:class-names="" text:cond-style-name=""><text:span text:style-name="a494" text:class-names=""><text:date text:fixed="false" style:data-style-name="a495">5/31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98" draw:name="Slide Image Placeholder 3">
          <svg:title/>
          <svg:desc/>
        </draw:page-thumbnail>
        <draw:frame draw:id="id10" presentation:style-name="a513" draw:name="Notes Placeholder 4" svg:x="0.75in" svg:y="4.8125in" svg:width="6in" svg:height="3.9375in" presentation:class="notes" presentation:placeholder="false">
          <draw:text-box>
            <text:p text:style-name="a500" text:class-names="" text:cond-style-name=""><text:span text:style-name="a499" text:class-names="">Click to edit Master text styles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Second level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16" draw:name="Footer Placeholder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2" presentation:style-name="a519" draw:name="Slide Number Placeholder 6" svg:x="4.24826in" svg:y="9.49826in" svg:width="3.25in" svg:height="0.50174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blank-Празен" style:page-layout-name="pageLayout1" draw:style-name="a522">
      <draw:custom-shape svg:x="0in" svg:y="2.20853in" svg:width="13.33333in" svg:height="4.49031in" draw:id="id72" draw:layer="Master1-bg" draw:style-name="a526" draw:name="Rectangle 7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draw:layer="Master1-bg" draw:style-name="a527" draw:name="Picture 6" svg:x="0in" svg:y="6.7in" svg:width="13.33333in" svg:height="0.8125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6.70211in" svg:x2="13.33333in" svg:y2="6.70211in" draw:id="id74" draw:layer="Master1-bg" draw:style-name="a528" draw:name="Straight Connector 9">
        <svg:title/>
        <svg:desc/>
      </draw:connector>
      <draw:frame draw:id="id75" presentation:style-name="a532" draw:name="Date Placeholder 1" svg:x="8.08937in" svg:y="6.93438in" svg:width="3.82843in" svg:height="0.33815in" presentation:class="date-time" presentation:placeholder="false">
        <draw:text-box>
          <text:p text:style-name="a531" text:class-names="" text:cond-style-name=""><text:span text:style-name="a529" text:class-names=""><text:date text:fixed="false" style:data-style-name="a530">5/31/2026</text:date></text:span></text:p>
        </draw:text-box>
        <svg:title/>
        <svg:desc/>
      </draw:frame>
      <draw:frame draw:id="id76" presentation:style-name="a535" draw:name="Footer Placeholder 2" svg:x="1.41553in" svg:y="6.93321in" svg:width="6.49479in" svg:height="0.33815in" presentation:class="footer" presentation:placeholder="false">
        <draw:text-box>
          <text:p text:style-name="a534" text:class-names="" text:cond-style-name=""><text:span text:style-name="a533" text:class-names="">Add Footer Here<text:s text:c="1"/></text:span></text:p>
        </draw:text-box>
        <svg:title/>
        <svg:desc/>
      </draw:frame>
      <presentation:notes style:page-layout-name="pageLayout2" draw:style-name="a565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5/31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8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2" presentation:style-name="a564" draw:name="Slide Number Placeholder 6" svg:x="4.24826in" svg:y="9.49826in" svg:width="3.25in" svg:height="0.50174in" presentation:class="page-number" presentation:placeholder="false">
          <draw:text-box>
            <text:p text:style-name="a563" text:class-names="" text:cond-style-name=""><text:span text:style-name="a5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Съдържание-с-надпис" style:page-layout-name="pageLayout1" draw:style-name="a567">
      <draw:custom-shape svg:x="0in" svg:y="2.20853in" svg:width="13.33333in" svg:height="4.49031in" draw:id="id77" draw:layer="Master1-bg" draw:style-name="a571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draw:layer="Master1-bg" draw:style-name="a572" draw:name="Picture 6" svg:x="0in" svg:y="6.7in" svg:width="13.33333in" svg:height="0.8125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6.70211in" svg:x2="13.33333in" svg:y2="6.70211in" draw:id="id79" draw:layer="Master1-bg" draw:style-name="a573" draw:name="Straight Connector 9">
        <svg:title/>
        <svg:desc/>
      </draw:connector>
      <draw:frame draw:id="id80" presentation:style-name="a590" draw:name="Content Placeholder 2" svg:x="5.57223in" svg:y="1.79956in" svg:width="6.3508in" svg:height="4.20041in" presentation:class="object" presentation:placeholder="false">
        <draw:text-box>
          <text:list text:style-name="a576">
            <text:list-item>
              <text:p text:style-name="a575" text:class-names="" text:cond-style-name=""><text:span text:style-name="a574" text:class-names="">Щракнете, за да редактирате стиловете на текста в образеца</text:span></text:p>
            </text:list-item>
          </text:list>
          <text:list text:style-name="a579">
            <text:list-item>
              <text:list text:style-name="a579">
                <text:list-item>
                  <text:p text:style-name="a578" text:class-names="" text:cond-style-name=""><text:span text:style-name="a577" text:class-names="">Второ ниво</text:span></text:p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p text:style-name="a581" text:class-names="" text:cond-style-name=""><text:span text:style-name="a580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p text:style-name="a584" text:class-names="" text:cond-style-name=""><text:span text:style-name="a583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list text:style-name="a589">
                            <text:list-item>
                              <text:p text:style-name="a588" text:class-names="" text:cond-style-name=""><text:span text:style-name="a586" text:class-names="">Пето ниво</text:span><text:span text:style-name="a5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594" draw:name="Text Placeholder 3" svg:x="1.41176in" svg:y="1.79956in" svg:width="3.93701in" svg:height="4.19589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82" presentation:style-name="a598" draw:name="Date Placeholder 4" svg:x="8.08937in" svg:y="6.93438in" svg:width="3.82843in" svg:height="0.33815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5/31/2026</text:date></text:span></text:p>
        </draw:text-box>
        <svg:title/>
        <svg:desc/>
      </draw:frame>
      <draw:frame draw:id="id83" presentation:style-name="a601" draw:name="Footer Placeholder 5" svg:x="1.41553in" svg:y="6.93321in" svg:width="6.49479in" svg:height="0.33815in" presentation:class="footer" presentation:placeholder="false">
        <draw:text-box>
          <text:p text:style-name="a600" text:class-names="" text:cond-style-name=""><text:span text:style-name="a599" text:class-names="">Add Footer Here</text:span></text:p>
        </draw:text-box>
        <svg:title/>
        <svg:desc/>
      </draw:frame>
      <draw:connector draw:type="line" svg:x1="1.41321in" svg:y1="1.62577in" svg:x2="11.92012in" svg:y2="1.62577in" draw:id="id84" draw:style-name="a602" draw:name="Straight Connector 8">
        <svg:title/>
        <svg:desc/>
      </draw:connector>
      <draw:frame draw:id="id85" presentation:style-name="a606" draw:name="Title 6" svg:x="1.41553in" svg:y="0.87983in" svg:width="10.50227in" svg:height="1.14746in" presentation:class="title" presentation:placeholder="false">
        <draw:text-box>
          <text:p text:style-name="a605" text:class-names="" text:cond-style-name=""><text:span text:style-name="a603" text:class-names="">Редакт. стил загл. образец</text:span><text:span text:style-name="a604" text:class-names=""/></text:p>
        </draw:text-box>
        <svg:title/>
        <svg:desc/>
      </draw:frame>
      <presentation:notes style:page-layout-name="pageLayout2" draw:style-name="a636">
        <draw:frame draw:id="id7" presentation:style-name="a609" draw:name="Header Placeholder 1" svg:x="0in" svg:y="0in" svg:width="3.25in" svg:height="0.50174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3" draw:name="Date Placeholder 2" svg:x="4.24826in" svg:y="0in" svg:width="3.25in" svg:height="0.50174in" presentation:class="date-time" presentation:placeholder="false">
          <draw:text-box>
            <text:p text:style-name="a612" text:class-names="" text:cond-style-name=""><text:span text:style-name="a610" text:class-names=""><text:date text:fixed="false" style:data-style-name="a611">5/31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14" draw:name="Slide Image Placeholder 3">
          <svg:title/>
          <svg:desc/>
        </draw:page-thumbnail>
        <draw:frame draw:id="id10" presentation:style-name="a629" draw:name="Notes Placeholder 4" svg:x="0.75in" svg:y="4.8125in" svg:width="6in" svg:height="3.9375in" presentation:class="notes" presentation:placeholder="false">
          <draw:text-box>
            <text:p text:style-name="a616" text:class-names="" text:cond-style-name=""><text:span text:style-name="a615" text:class-names="">Click to edit Master text styles</text:span></text:p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Second level</text:span></text:p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p text:style-name="a621" text:class-names="" text:cond-style-name=""><text:span text:style-name="a6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p text:style-name="a624" text:class-names="" text:cond-style-name=""><text:span text:style-name="a6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list text:style-name="a628">
                              <text:list-item>
                                <text:p text:style-name="a627" text:class-names="" text:cond-style-name=""><text:span text:style-name="a6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2" draw:name="Footer Placeholder 5" svg:x="0in" svg:y="9.49826in" svg:width="3.25in" svg:height="0.50174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2" presentation:style-name="a635" draw:name="Slide Number Placeholder 6" svg:x="4.24826in" svg:y="9.49826in" svg:width="3.25in" svg:height="0.50174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Content-and-Gallery-" style:page-layout-name="pageLayout1" draw:style-name="a638">
      <draw:custom-shape svg:x="0in" svg:y="2.20853in" svg:width="13.33333in" svg:height="4.49031in" draw:id="id86" draw:layer="Master1-bg" draw:style-name="a642" draw:name="Rectangle 7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draw:layer="Master1-bg" draw:style-name="a643" draw:name="Picture 6" svg:x="0in" svg:y="6.7in" svg:width="13.33333in" svg:height="0.8125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6.70211in" svg:x2="13.33333in" svg:y2="6.70211in" draw:id="id88" draw:layer="Master1-bg" draw:style-name="a644" draw:name="Straight Connector 9">
        <svg:title/>
        <svg:desc/>
      </draw:connector>
      <draw:frame draw:id="id89" presentation:style-name="a661" draw:name="Content Placeholder 2" svg:x="1.42213in" svg:y="3.42134in" svg:width="3.30709in" svg:height="2.08504in" presentation:class="object" presentation:placeholder="false">
        <draw:text-box>
          <text:list text:style-name="a647">
            <text:list-item>
              <text:p text:style-name="a646" text:class-names="" text:cond-style-name=""><text:span text:style-name="a645" text:class-names="">Щракнете, за да редактирате стиловете на текста в образеца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Второ ниво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p text:style-name="a659" text:class-names="" text:cond-style-name=""><text:span text:style-name="a657" text:class-names="">Пето ниво</text:span><text:span text:style-name="a6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65" draw:name="Text Placeholder 3" svg:x="8.61072in" svg:y="5.62662in" svg:width="3.32069in" svg:height="0.88299in" presentation:class="outline" presentation:placeholder="false">
        <draw:text-box>
          <text:list text:style-name="a664">
            <text:list-item>
              <text:p text:style-name="a663" text:class-names="" text:cond-style-name=""><text:span text:style-name="a66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91" presentation:style-name="a669" draw:name="Date Placeholder 4" svg:x="8.08937in" svg:y="6.93438in" svg:width="3.82843in" svg:height="0.33815in" presentation:class="date-time" presentation:placeholder="false">
        <draw:text-box>
          <text:p text:style-name="a668" text:class-names="" text:cond-style-name=""><text:span text:style-name="a666" text:class-names=""><text:date text:fixed="false" style:data-style-name="a667">5/31/2026</text:date></text:span></text:p>
        </draw:text-box>
        <svg:title/>
        <svg:desc/>
      </draw:frame>
      <draw:frame draw:id="id92" presentation:style-name="a672" draw:name="Footer Placeholder 5" svg:x="1.41553in" svg:y="6.93321in" svg:width="6.49479in" svg:height="0.33815in" presentation:class="footer" presentation:placeholder="false">
        <draw:text-box>
          <text:p text:style-name="a671" text:class-names="" text:cond-style-name=""><text:span text:style-name="a670" text:class-names="">Add Footer Here</text:span></text:p>
        </draw:text-box>
        <svg:title/>
        <svg:desc/>
      </draw:frame>
      <draw:connector draw:type="line" svg:x1="1.41321in" svg:y1="1.62577in" svg:x2="11.92012in" svg:y2="1.62577in" draw:id="id93" draw:style-name="a673" draw:name="Straight Connector 8">
        <svg:title/>
        <svg:desc/>
      </draw:connector>
      <draw:frame draw:id="id94" presentation:style-name="a690" draw:name="Content Placeholder 2" svg:x="5.03293in" svg:y="3.42134in" svg:width="3.30709in" svg:height="2.08504in" presentation:class="object" presentation:placeholder="false">
        <draw:text-box>
          <text:list text:style-name="a676">
            <text:list-item>
              <text:p text:style-name="a675" text:class-names="" text:cond-style-name=""><text:span text:style-name="a674" text:class-names="">Щракнете, за да редактирате стиловете на текста в образеца</text:span></text:p>
            </text:list-item>
          </text:list>
          <text:list text:style-name="a679">
            <text:list-item>
              <text:list text:style-name="a679">
                <text:list-item>
                  <text:p text:style-name="a678" text:class-names="" text:cond-style-name=""><text:span text:style-name="a677" text:class-names="">Второ ниво</text:span></text:p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p text:style-name="a681" text:class-names="" text:cond-style-name=""><text:span text:style-name="a680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p text:style-name="a684" text:class-names="" text:cond-style-name=""><text:span text:style-name="a683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6" text:class-names="">Пето ниво</text:span><text:span text:style-name="a6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707" draw:name="Content Placeholder 2" svg:x="8.61072in" svg:y="3.42134in" svg:width="3.30709in" svg:height="2.08504in" presentation:class="object" presentation:placeholder="false">
        <draw:text-box>
          <text:list text:style-name="a693">
            <text:list-item>
              <text:p text:style-name="a692" text:class-names="" text:cond-style-name=""><text:span text:style-name="a691" text:class-names="">Щракнете, за да редактирате стиловете на текста в образеца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Второ ниво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3" text:class-names="">Пето ниво</text:span><text:span text:style-name="a7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11" draw:name="Text Placeholder 3" svg:x="5.02613in" svg:y="5.62662in" svg:width="3.32069in" svg:height="0.88299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97" presentation:style-name="a715" draw:name="Text Placeholder 3" svg:x="1.4289in" svg:y="5.62662in" svg:width="3.32069in" svg:height="0.88299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connector draw:type="line" svg:x1="4.90385in" svg:y1="5.62662in" svg:x2="4.90385in" svg:y2="6.50961in" draw:id="id98" draw:style-name="a716" draw:name="Straight Connector 12">
        <svg:title/>
        <svg:desc/>
      </draw:connector>
      <draw:connector draw:type="line" svg:x1="8.48398in" svg:y1="5.62662in" svg:x2="8.48398in" svg:y2="6.50961in" draw:id="id99" draw:style-name="a717" draw:name="Straight Connector 13">
        <svg:title/>
        <svg:desc/>
      </draw:connector>
      <draw:frame draw:id="id100" presentation:style-name="a734" draw:name="Text Placeholder 18" svg:x="1.41175in" svg:y="1.7691in" svg:width="10.5188in" svg:height="1.46181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Щракнете, за да редактирате стиловете на текста в образеца</text:span></text:p>
            </text:list-item>
          </text:list>
          <text:list text:style-name="a723">
            <text:list-item>
              <text:list text:style-name="a723">
                <text:list-item>
                  <text:p text:style-name="a722" text:class-names="" text:cond-style-name=""><text:span text:style-name="a721" text:class-names="">Второ ниво</text:span></text:p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p text:style-name="a725" text:class-names="" text:cond-style-name=""><text:span text:style-name="a72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p text:style-name="a728" text:class-names="" text:cond-style-name=""><text:span text:style-name="a72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0" text:class-names="">Пето ниво</text:span><text:span text:style-name="a7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38" draw:name="Title 6" svg:x="1.41553in" svg:y="0.87983in" svg:width="10.50227in" svg:height="1.14746in" presentation:class="title" presentation:placeholder="false">
        <draw:text-box>
          <text:p text:style-name="a737" text:class-names="" text:cond-style-name=""><text:span text:style-name="a735" text:class-names="">Редакт. стил загл. образец</text:span><text:span text:style-name="a736" text:class-names=""/></text:p>
        </draw:text-box>
        <svg:title/>
        <svg:desc/>
      </draw:frame>
      <presentation:notes style:page-layout-name="pageLayout2" draw:style-name="a768">
        <draw:frame draw:id="id7" presentation:style-name="a741" draw:name="Header Placeholder 1" svg:x="0in" svg:y="0in" svg:width="3.25in" svg:height="0.50174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8" presentation:style-name="a745" draw:name="Date Placeholder 2" svg:x="4.24826in" svg:y="0in" svg:width="3.25in" svg:height="0.50174in" presentation:class="date-time" presentation:placeholder="false">
          <draw:text-box>
            <text:p text:style-name="a744" text:class-names="" text:cond-style-name=""><text:span text:style-name="a742" text:class-names=""><text:date text:fixed="false" style:data-style-name="a743">5/31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46" draw:name="Slide Image Placeholder 3">
          <svg:title/>
          <svg:desc/>
        </draw:page-thumbnail>
        <draw:frame draw:id="id10" presentation:style-name="a761" draw:name="Notes Placeholder 4" svg:x="0.75in" svg:y="4.8125in" svg:width="6in" svg:height="3.9375in" presentation:class="notes" presentation:placeholder="false">
          <draw:text-box>
            <text:p text:style-name="a748" text:class-names="" text:cond-style-name=""><text:span text:style-name="a747" text:class-names="">Click to edit Master text styles</text:span></text:p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Second level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p text:style-name="a753" text:class-names="" text:cond-style-name=""><text:span text:style-name="a7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list text:style-name="a757">
                          <text:list-item>
                            <text:p text:style-name="a756" text:class-names="" text:cond-style-name=""><text:span text:style-name="a7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list text:style-name="a760">
                              <text:list-item>
                                <text:p text:style-name="a759" text:class-names="" text:cond-style-name=""><text:span text:style-name="a7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64" draw:name="Footer Placeholder 5" svg:x="0in" svg:y="9.49826in" svg:width="3.25in" svg:height="0.50174in" presentation:class="footer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12" presentation:style-name="a767" draw:name="Slide Number Placeholder 6" svg:x="4.24826in" svg:y="9.49826in" svg:width="3.25in" svg:height="0.50174in" presentation:class="page-number" presentation:placeholder="false">
          <draw:text-box>
            <text:p text:style-name="a766" text:class-names="" text:cond-style-name=""><text:span text:style-name="a7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picTx-Картина-с-надпис" style:page-layout-name="pageLayout1" draw:style-name="a770">
      <draw:custom-shape svg:x="0in" svg:y="2.20853in" svg:width="13.33333in" svg:height="4.49031in" draw:id="id102" draw:layer="Master1-bg" draw:style-name="a774" draw:name="Rectangle 7">
        <svg:title/>
        <svg:desc/>
        <text:p text:style-name="a772" text:class-names="" text:cond-style-name=""><text:span text:style-name="a7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3" draw:layer="Master1-bg" draw:style-name="a775" draw:name="Picture 6" svg:x="0in" svg:y="6.7in" svg:width="13.33333in" svg:height="0.8125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6.70211in" svg:x2="13.33333in" svg:y2="6.70211in" draw:id="id104" draw:layer="Master1-bg" draw:style-name="a776" draw:name="Straight Connector 9">
        <svg:title/>
        <svg:desc/>
      </draw:connector>
      <draw:g draw:name="Group 7" draw:id="id105">
        <svg:title/>
        <svg:desc/>
        <draw:custom-shape svg:x="8.17737in" svg:y="0.52731in" svg:width="4.45596in" svg:height="5.63113in" draw:id="id112" draw:style-name="a800" draw:name="Rectangle 1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113" draw:style-name="a804" draw:name="Rectangle 18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06" presentation:style-name="a780" draw:name="Title 1" svg:x="1.58706in" svg:y="1.23525in" svg:width="6.05023in" svg:height="2.00195in" presentation:class="title" presentation:placeholder="false">
        <draw:text-box>
          <text:p text:style-name="a779" text:class-names="" text:cond-style-name=""><text:span text:style-name="a777" text:class-names="">Редакт. стил загл. образец</text:span><text:span text:style-name="a778" text:class-names=""/></text:p>
        </draw:text-box>
        <svg:title/>
        <svg:desc/>
      </draw:frame>
      <draw:frame draw:id="id107" presentation:style-name="a784" draw:name="Picture Placeholder 2" svg:x="8.88494in" svg:y="1.22763in" svg:width="3.05246in" svg:height="4.22827in" presentation:class="graphic" presentation:placeholder="false">
        <draw:text-box>
          <text:p text:style-name="a783" text:class-names="" text:cond-style-name=""><text:span text:style-name="a781" text:class-names="">Щракнете върху иконата, за да добавите картина</text:span><text:span text:style-name="a782" text:class-names=""/></text:p>
        </draw:text-box>
        <svg:title/>
        <svg:desc/>
      </draw:frame>
      <draw:frame draw:id="id108" presentation:style-name="a788" draw:name="Text Placeholder 3" svg:x="1.5861in" svg:y="3.4405in" svg:width="6.04156in" svg:height="2.19132in" presentation:class="outline" presentation:placeholder="false">
        <draw:text-box>
          <text:list text:style-name="a787">
            <text:list-item>
              <text:p text:style-name="a786" text:class-names="" text:cond-style-name=""><text:span text:style-name="a785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09" presentation:style-name="a792" draw:name="Date Placeholder 4" svg:x="7.91346in" svg:y="6.92539in" svg:width="4.71987in" svg:height="0.35009in" presentation:class="date-time" presentation:placeholder="false">
        <draw:text-box>
          <text:p text:style-name="a791" text:class-names="" text:cond-style-name=""><text:span text:style-name="a789" text:class-names=""><text:date text:fixed="false" style:data-style-name="a790">5/31/2026</text:date></text:span></text:p>
        </draw:text-box>
        <svg:title/>
        <svg:desc/>
      </draw:frame>
      <draw:frame draw:id="id110" presentation:style-name="a795" draw:name="Footer Placeholder 5" svg:x="1.58288in" svg:y="6.92539in" svg:width="6.05972in" svg:height="0.35097in" presentation:class="footer" presentation:placeholder="false">
        <draw:text-box>
          <text:p text:style-name="a794" text:class-names="" text:cond-style-name=""><text:span text:style-name="a793" text:class-names="">Add Footer Here</text:span></text:p>
        </draw:text-box>
        <svg:title/>
        <svg:desc/>
      </draw:frame>
      <draw:connector draw:type="line" svg:x1="1.58288in" svg:y1="3.43789in" svg:x2="7.62766in" svg:y2="3.43789in" draw:id="id111" draw:style-name="a796" draw:name="Straight Connector 30">
        <svg:title/>
        <svg:desc/>
      </draw:connector>
      <presentation:notes style:page-layout-name="pageLayout2" draw:style-name="a834">
        <draw:frame draw:id="id7" presentation:style-name="a807" draw:name="Header Placeholder 1" svg:x="0in" svg:y="0in" svg:width="3.25in" svg:height="0.50174in" presentation:class="head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8" presentation:style-name="a811" draw:name="Date Placeholder 2" svg:x="4.24826in" svg:y="0in" svg:width="3.25in" svg:height="0.50174in" presentation:class="date-time" presentation:placeholder="false">
          <draw:text-box>
            <text:p text:style-name="a810" text:class-names="" text:cond-style-name=""><text:span text:style-name="a808" text:class-names=""><text:date text:fixed="false" style:data-style-name="a809">5/31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812" draw:name="Slide Image Placeholder 3">
          <svg:title/>
          <svg:desc/>
        </draw:page-thumbnail>
        <draw:frame draw:id="id10" presentation:style-name="a827" draw:name="Notes Placeholder 4" svg:x="0.75in" svg:y="4.8125in" svg:width="6in" svg:height="3.9375in" presentation:class="notes" presentation:placeholder="false">
          <draw:text-box>
            <text:p text:style-name="a814" text:class-names="" text:cond-style-name=""><text:span text:style-name="a813" text:class-names="">Click to edit Master text styles</text:span></text:p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Second level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p text:style-name="a819" text:class-names="" text:cond-style-name=""><text:span text:style-name="a8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list text:style-name="a823">
                          <text:list-item>
                            <text:p text:style-name="a822" text:class-names="" text:cond-style-name=""><text:span text:style-name="a8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list text:style-name="a826">
                          <text:list-item>
                            <text:list text:style-name="a826">
                              <text:list-item>
                                <text:p text:style-name="a825" text:class-names="" text:cond-style-name=""><text:span text:style-name="a8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30" draw:name="Footer Placeholder 5" svg:x="0in" svg:y="9.49826in" svg:width="3.25in" svg:height="0.50174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2" presentation:style-name="a833" draw:name="Slide Number Placeholder 6" svg:x="4.24826in" svg:y="9.49826in" svg:width="3.25in" svg:height="0.50174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5">
      <draw:frame draw:id="id114" presentation:style-name="a838" draw:name="Header Placeholder 1" svg:x="0in" svg:y="0in" svg:width="3.25in" svg:height="0.50174in" presentation:class="head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115" presentation:style-name="a842" draw:name="Date Placeholder 2" svg:x="4.24826in" svg:y="0in" svg:width="3.25in" svg:height="0.50174in" presentation:class="date-time" presentation:placeholder="false">
        <draw:text-box>
          <text:p text:style-name="a841" text:class-names="" text:cond-style-name=""><text:span text:style-name="a839" text:class-names=""><text:date text:fixed="false" style:data-style-name="a840">5/31/2026</text:date></text:span></text:p>
        </draw:text-box>
        <svg:title/>
        <svg:desc/>
      </draw:frame>
      <draw:frame draw:id="id116" presentation:style-name="a845" draw:name="Footer Placeholder 3" svg:x="0in" svg:y="9.49826in" svg:width="3.25in" svg:height="0.50174in" presentation:class="footer" presentation:placeholder="false">
        <draw:text-box>
          <text:p text:style-name="a844" text:class-names="" text:cond-style-name=""><text:span text:style-name="a843" text:class-names=""/></text:p>
        </draw:text-box>
        <svg:title/>
        <svg:desc/>
      </draw:frame>
      <draw:frame draw:id="id117" presentation:style-name="a848" draw:name="Slide Number Placeholder 4" svg:x="4.24826in" svg:y="9.49826in" svg:width="3.25in" svg:height="0.50174in" presentation:class="page-number" presentation:placeholder="false">
        <draw:text-box>
          <text:p text:style-name="a847" text:class-names="" text:cond-style-name=""><text:span text:style-name="a84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Алекс Първанов</meta:initial-creator>
    <dc:creator>Алекс Първанов</dc:creator>
    <meta:creation-date>2026-05-30T07:37:38Z</meta:creation-date>
    <dc:date>2026-05-31T12:33:16Z</dc:date>
    <meta:template xlink:href="My%20invention" xlink:type="simple"/>
    <meta:editing-cycles>10</meta:editing-cycles>
    <meta:editing-duration>PT22417S</meta:editing-duration>
    <meta:document-statistic meta:paragraph-count="114" meta:word-count="1103"/>
  </office:meta>
</office:document-meta>
</file>